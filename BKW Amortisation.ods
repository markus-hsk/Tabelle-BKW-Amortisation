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771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2.376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3.242cm"/>
    </style:style>
    <style:style style:name="co15" style:family="table-column">
      <style:table-column-properties fo:break-before="auto" style:column-width="2.40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886cm"/>
    </style:style>
    <style:style style:name="ro1" style:family="table-row">
      <style:table-row-properties style:row-height="0.8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33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06" style:family="table-cell" style:parent-style-name="Default">
      <style:table-cell-properties fo:border-bottom="0.74pt solid #000000" fo:border-left="none" fo:border-right="none" fo:border-top="none"/>
    </style:style>
    <style:style style:name="ce207" style:family="table-cell" style:parent-style-name="Default" style:data-style-name="N116">
      <style:table-cell-properties fo:border-bottom="0.74pt solid #000000" style:text-align-source="fix" style:repeat-content="false" fo:border-left="none" fo:border-right="0.74pt solid #999999" fo:border-top="0.74pt solid #000000"/>
      <style:paragraph-properties fo:text-align="start" fo:margin-left="0cm"/>
    </style:style>
    <style:style style:name="ce208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5cm" fo:border-right="none" style:rotation-angle="270" fo:border-top="none" style:vertical-align="to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10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f2f2f2"/>
    </style:style>
    <style:style style:name="ce213" style:family="table-cell" style:parent-style-name="Default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middle"/>
      <style:text-properties fo:font-size="14pt" fo:font-style="italic" style:font-size-asian="14pt" style:font-style-asian="italic" style:font-size-complex="14pt" style:font-style-complex="italic"/>
    </style:style>
    <style:style style:name="ce119" style:family="table-cell" style:parent-style-name="Default">
      <style:table-cell-properties fo:border-bottom="0.74pt solid #000000" fo:wrap-option="wrap" fo:border-left="0.74pt solid #999999" fo:border-right="0.74pt solid #999999" fo:border-top="none"/>
      <style:text-properties fo:font-weight="bold" style:font-weight-asian="bold" style:font-weight-complex="bold"/>
    </style:style>
    <style:style style:name="ce122" style:family="table-cell" style:parent-style-name="Default" style:data-style-name="N116">
      <style:table-cell-properties fo:border-bottom="0.74pt solid #000000" style:text-align-source="fix" style:repeat-content="false" fo:border-left="0.74pt solid #999999" fo:border-right="0.74pt solid #999999" fo:border-top="none"/>
      <style:paragraph-properties fo:text-align="start" fo:margin-left="0cm"/>
    </style:style>
    <style:style style:name="ce222" style:family="table-cell" style:parent-style-name="Default" style:data-style-name="N125">
      <style:table-cell-properties fo:border-bottom="0.74pt solid #b3b3b3" style:text-align-source="fix" style:repeat-content="false" fo:border-left="0.74pt solid #999999" fo:border-right="0.74pt solid #999999" fo:border-top="none"/>
      <style:paragraph-properties fo:text-align="start" fo:margin-left="0cm"/>
      <style:text-properties fo:color="#666666"/>
    </style:style>
    <style:style style:name="ce218" style:family="table-cell" style:parent-style-name="Default" style:data-style-name="N125">
      <style:table-cell-properties fo:border-bottom="0.74pt solid #b3b3b3" fo:background-color="#f2f2f2" style:text-align-source="fix" style:repeat-content="false" fo:border-left="0.74pt solid #999999" fo:border-right="0.74pt solid #999999" fo:border-top="0.74pt solid #b3b3b3"/>
      <style:paragraph-properties fo:text-align="start" fo:margin-left="0cm"/>
      <style:text-properties fo:color="#666666"/>
    </style:style>
    <style:style style:name="ce223" style:family="table-cell" style:parent-style-name="Default" style:data-style-name="N125">
      <style:table-cell-properties fo:border-bottom="0.74pt solid #b3b3b3" style:text-align-source="fix" style:repeat-content="false" fo:border-left="0.74pt solid #999999" fo:border-right="0.74pt solid #999999" fo:border-top="0.74pt solid #b3b3b3"/>
      <style:paragraph-properties fo:text-align="start" fo:margin-left="0cm"/>
      <style:text-properties fo:color="#666666"/>
    </style:style>
    <style:style style:name="ce220" style:family="table-cell" style:parent-style-name="Default" style:data-style-name="N125">
      <style:table-cell-properties fo:border-bottom="0.74pt solid #b3b3b3" fo:background-color="#f2f2f2" style:text-align-source="fix" style:repeat-content="false" fo:border-left="0.74pt solid #999999" fo:border-right="0.74pt solid #999999" fo:border-top="0.74pt solid #b3b3b3"/>
      <style:paragraph-properties fo:text-align="start" fo:margin-left="0cm"/>
      <style:text-properties fo:color="#008000" fo:font-weight="bold" style:font-weight-asian="bold" style:font-weight-complex="bold"/>
    </style:style>
    <style:style style:name="ce142" style:family="table-cell" style:parent-style-name="Default" style:data-style-name="N125">
      <style:table-cell-properties fo:border-bottom="0.74pt solid #b3b3b3" style:text-align-source="fix" style:repeat-content="false" fo:border-left="0.74pt solid #999999" fo:border-right="0.74pt solid #999999" fo:border-top="0.74pt solid #b3b3b3"/>
      <style:paragraph-properties fo:text-align="start" fo:margin-left="0cm"/>
    </style:style>
    <style:style style:name="ce237" style:family="table-cell" style:parent-style-name="Default" style:data-style-name="N125">
      <style:table-cell-properties fo:border-bottom="0.74pt solid #b3b3b3" fo:background-color="#f2f2f2" style:text-align-source="fix" style:repeat-content="false" fo:border-left="0.74pt solid #999999" fo:border-right="0.74pt solid #999999" fo:border-top="0.74pt solid #b3b3b3"/>
      <style:paragraph-properties fo:text-align="start" fo:margin-left="0cm"/>
    </style:style>
    <style:style style:name="ce238" style:family="table-cell" style:parent-style-name="Default" style:data-style-name="N125">
      <style:table-cell-properties fo:border-bottom="0.74pt solid #000000" fo:background-color="#f2f2f2" style:text-align-source="fix" style:repeat-content="false" fo:border-left="0.74pt solid #999999" fo:border-right="0.74pt solid #999999" fo:border-top="0.74pt solid #b3b3b3"/>
      <style:paragraph-properties fo:text-align="start" fo:margin-left="0cm"/>
    </style:style>
    <style:style style:name="ce128" style:family="table-cell" style:parent-style-name="Default" style:data-style-name="N125">
      <style:table-cell-properties fo:border-bottom="0.74pt solid #b3b3b3" style:text-align-source="fix" style:repeat-content="false" fo:border-left="0.74pt solid #999999" fo:border-right="0.74pt solid #999999" fo:border-top="none"/>
      <style:paragraph-properties fo:text-align="start" fo:margin-left="0cm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vertical-align="middle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37"/>
    <style:style style:name="ce245" style:family="table-cell" style:parent-style-name="Default" style:data-style-name="N37">
      <style:table-cell-properties fo:background-color="#f2f2f2"/>
    </style:style>
    <style:style style:name="ce146" style:family="table-cell" style:parent-style-name="Default">
      <style:table-cell-properties fo:border-bottom="0.74pt solid #000000" style:text-align-source="fix" style:repeat-content="false" fo:wrap-option="wrap" fo:border-left="0.74pt solid #999999" fo:border-right="0.74pt solid #999999" fo:border-top="non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118">
      <style:table-cell-properties fo:border-bottom="0.74pt solid #000000" fo:background-color="transparent" fo:border-left="0.74pt solid #999999" fo:border-right="0.74pt solid #999999" fo:border-top="none"/>
    </style:style>
    <style:style style:name="ce233" style:family="table-cell" style:parent-style-name="Default" style:data-style-name="N118">
      <style:table-cell-properties fo:border-bottom="0.74pt solid #b3b3b3" fo:background-color="transparent" fo:border-left="0.74pt solid #999999" fo:border-right="0.74pt solid #999999" fo:border-top="none"/>
      <style:text-properties fo:color="#666666"/>
    </style:style>
    <style:style style:name="ce250" style:family="table-cell" style:parent-style-name="Default" style:data-style-name="N118">
      <style:table-cell-properties fo:border-bottom="0.74pt solid #b3b3b3" fo:background-color="#f2f2f2" fo:border-left="0.74pt solid #999999" fo:border-right="0.74pt solid #999999" fo:border-top="0.74pt solid #b3b3b3"/>
      <style:text-properties fo:color="#666666"/>
    </style:style>
    <style:style style:name="ce234" style:family="table-cell" style:parent-style-name="Default" style:data-style-name="N118">
      <style:table-cell-properties fo:border-bottom="0.74pt solid #b3b3b3" fo:background-color="transparent" fo:border-left="0.74pt solid #999999" fo:border-right="0.74pt solid #999999" fo:border-top="0.74pt solid #b3b3b3"/>
      <style:text-properties fo:color="#666666"/>
    </style:style>
    <style:style style:name="ce252" style:family="table-cell" style:parent-style-name="Default" style:data-style-name="N118">
      <style:table-cell-properties fo:border-bottom="0.74pt solid #b3b3b3" fo:background-color="#f2f2f2" fo:border-left="0.74pt solid #999999" fo:border-right="0.74pt solid #999999" fo:border-top="0.74pt solid #b3b3b3"/>
    </style:style>
    <style:style style:name="ce149" style:family="table-cell" style:parent-style-name="Default" style:data-style-name="N118">
      <style:table-cell-properties fo:border-bottom="0.74pt solid #b3b3b3" fo:background-color="transparent" fo:border-left="0.74pt solid #999999" fo:border-right="0.74pt solid #999999" fo:border-top="0.74pt solid #b3b3b3"/>
    </style:style>
    <style:style style:name="ce254" style:family="table-cell" style:parent-style-name="Default" style:data-style-name="N118">
      <style:table-cell-properties fo:border-bottom="0.74pt solid #000000" fo:background-color="#f2f2f2" fo:border-left="0.74pt solid #999999" fo:border-right="0.74pt solid #999999" fo:border-top="0.74pt solid #b3b3b3"/>
    </style:style>
    <style:style style:name="ce148" style:family="table-cell" style:parent-style-name="Default" style:data-style-name="N118">
      <style:table-cell-properties fo:border-bottom="0.74pt solid #b3b3b3" fo:background-color="transparent" fo:border-left="0.74pt solid #999999" fo:border-right="0.74pt solid #999999" fo:border-top="none"/>
    </style:style>
    <style:style style:name="ce152" style:family="table-cell" style:parent-style-name="Default" style:data-style-name="N124"/>
    <style:style style:name="ce258" style:family="table-cell" style:parent-style-name="Default" style:data-style-name="N124">
      <style:table-cell-properties fo:background-color="#f2f2f2"/>
    </style:style>
    <style:style style:name="ce231" style:family="table-cell" style:parent-style-name="Default" style:data-style-name="N114"/>
    <style:style style:name="ce259" style:family="table-cell" style:parent-style-name="Default" style:data-style-name="N114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54" style:family="table-cell" style:parent-style-name="Default" style:data-style-name="N114">
      <style:table-cell-properties fo:border-bottom="0.74pt solid #000000" fo:border-left="0.74pt solid #999999" fo:border-right="0.74pt solid #999999" fo:border-top="none"/>
    </style:style>
    <style:style style:name="ce241" style:family="table-cell" style:parent-style-name="Default" style:data-style-name="N114">
      <style:table-cell-properties fo:border-bottom="0.74pt solid #b3b3b3" fo:border-left="0.74pt solid #999999" fo:border-right="0.74pt solid #999999" fo:border-top="none"/>
      <style:text-properties fo:color="#666666"/>
    </style:style>
    <style:style style:name="ce262" style:family="table-cell" style:parent-style-name="Default" style:data-style-name="N114">
      <style:table-cell-properties fo:border-bottom="0.74pt solid #b3b3b3" fo:background-color="#f2f2f2" fo:border-left="0.74pt solid #999999" fo:border-right="0.74pt solid #999999" fo:border-top="0.74pt solid #b3b3b3"/>
      <style:text-properties fo:color="#666666"/>
    </style:style>
    <style:style style:name="ce242" style:family="table-cell" style:parent-style-name="Default" style:data-style-name="N114">
      <style:table-cell-properties fo:border-bottom="0.74pt solid #b3b3b3" fo:border-left="0.74pt solid #999999" fo:border-right="0.74pt solid #999999" fo:border-top="0.74pt solid #b3b3b3"/>
      <style:text-properties fo:color="#666666"/>
    </style:style>
    <style:style style:name="ce264" style:family="table-cell" style:parent-style-name="Default" style:data-style-name="N114">
      <style:table-cell-properties fo:border-bottom="0.74pt solid #b3b3b3" fo:background-color="#f2f2f2" fo:border-left="0.74pt solid #999999" fo:border-right="0.74pt solid #999999" fo:border-top="0.74pt solid #b3b3b3"/>
      <style:text-properties fo:color="#ff0000"/>
    </style:style>
    <style:style style:name="ce156" style:family="table-cell" style:parent-style-name="Default" style:data-style-name="N114">
      <style:table-cell-properties fo:border-bottom="0.74pt solid #b3b3b3" fo:border-left="0.74pt solid #999999" fo:border-right="0.74pt solid #999999" fo:border-top="0.74pt solid #b3b3b3"/>
    </style:style>
    <style:style style:name="ce266" style:family="table-cell" style:parent-style-name="Default" style:data-style-name="N114">
      <style:table-cell-properties fo:border-bottom="0.74pt solid #b3b3b3" fo:background-color="#f2f2f2" fo:border-left="0.74pt solid #999999" fo:border-right="0.74pt solid #999999" fo:border-top="0.74pt solid #b3b3b3"/>
    </style:style>
    <style:style style:name="ce267" style:family="table-cell" style:parent-style-name="Default" style:data-style-name="N114">
      <style:table-cell-properties fo:border-bottom="0.74pt solid #000000" fo:background-color="#f2f2f2" fo:border-left="0.74pt solid #999999" fo:border-right="0.74pt solid #999999" fo:border-top="0.74pt solid #b3b3b3"/>
    </style:style>
    <style:style style:name="ce268" style:family="table-cell" style:parent-style-name="Default" style:data-style-name="N114">
      <style:table-cell-properties fo:border-bottom="0.74pt solid #b3b3b3" fo:border-left="0.74pt solid #999999" fo:border-right="0.74pt solid #999999" fo:border-top="none"/>
      <style:text-properties fo:color="#579d1c"/>
    </style:style>
    <style:style style:name="ce155" style:family="table-cell" style:parent-style-name="Default" style:data-style-name="N114">
      <style:table-cell-properties fo:border-bottom="0.74pt solid #b3b3b3" fo:border-left="0.74pt solid #999999" fo:border-right="0.74pt solid #999999" fo:border-top="none"/>
    </style:style>
    <style:style style:name="ce255" style:family="table-cell" style:parent-style-name="Default" style:data-style-name="N114">
      <style:table-cell-properties fo:border-bottom="0.74pt solid #b3b3b3" fo:border-left="0.74pt solid #999999" fo:border-right="0.74pt solid #999999" fo:border-top="none"/>
      <style:text-properties style:use-window-font-color="true"/>
    </style:style>
    <style:style style:name="ce271" style:family="table-cell" style:parent-style-name="Default" style:data-style-name="N114">
      <style:table-cell-properties fo:border-bottom="0.74pt solid #b3b3b3" fo:background-color="#f2f2f2" fo:border-left="0.74pt solid #999999" fo:border-right="0.74pt solid #999999" fo:border-top="none"/>
      <style:text-properties style:use-window-font-color="true"/>
    </style:style>
    <style:style style:name="ce138" style:family="table-cell" style:parent-style-name="Default">
      <style:table-cell-properties style:vertical-align="middle"/>
    </style:style>
    <style:style style:name="ce272" style:family="table-cell" style:parent-style-name="Default">
      <style:table-cell-properties fo:border-bottom="0.74pt solid #000000" style:text-align-source="fix" style:repeat-content="false" fo:wrap-option="wrap" fo:border-left="0.74pt solid #999999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23">
      <style:table-cell-properties fo:border-bottom="0.74pt solid #000000" fo:background-color="transparent" fo:border-left="0.74pt solid #999999" fo:border-right="none" fo:border-top="none"/>
    </style:style>
    <style:style style:name="ce274" style:family="table-cell" style:parent-style-name="Default" style:data-style-name="N123">
      <style:table-cell-properties fo:border-bottom="0.74pt solid #b3b3b3" fo:background-color="transparent" fo:border-left="0.74pt solid #999999" fo:border-right="none" fo:border-top="none"/>
    </style:style>
    <style:style style:name="ce275" style:family="table-cell" style:parent-style-name="Default" style:data-style-name="N123">
      <style:table-cell-properties fo:border-bottom="0.74pt solid #b3b3b3" fo:background-color="#f2f2f2" fo:border-left="0.74pt solid #999999" fo:border-right="none" fo:border-top="0.74pt solid #b3b3b3"/>
    </style:style>
    <style:style style:name="ce276" style:family="table-cell" style:parent-style-name="Default" style:data-style-name="N123">
      <style:table-cell-properties fo:border-bottom="0.74pt solid #b3b3b3" fo:background-color="transparent" fo:border-left="0.74pt solid #999999" fo:border-right="none" fo:border-top="0.74pt solid #b3b3b3"/>
    </style:style>
    <style:style style:name="ce277" style:family="table-cell" style:parent-style-name="Default" style:data-style-name="N123">
      <style:table-cell-properties fo:border-bottom="0.74pt solid #000000" fo:background-color="#f2f2f2" fo:border-left="0.74pt solid #999999" fo:border-right="none" fo:border-top="0.74pt solid #b3b3b3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0" style:family="table-cell" style:parent-style-name="Default">
      <style:table-cell-properties fo:border-bottom="0.74pt solid #000000" style:text-align-source="fix" style:repeat-content="false" fo:wrap-option="wrap" fo:border-left="none" fo:border-right="0.74pt solid #999999" fo:border-top="none"/>
      <style:paragraph-properties fo:text-align="center" fo:margin-left="0cm"/>
      <style:text-properties fo:font-weight="bold" style:font-weight-asian="bold" style:font-weight-complex="bold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1" style:family="table-cell" style:parent-style-name="Default" style:data-style-name="N123">
      <style:table-cell-properties fo:border-bottom="0.74pt solid #000000" style:text-align-source="fix" style:repeat-content="false" fo:background-color="transparent" fo:border-left="none" fo:border-right="0.74pt solid #999999" fo:border-top="none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2" style:family="table-cell" style:parent-style-name="Default" style:data-style-name="N123">
      <style:table-cell-properties fo:border-bottom="0.74pt solid #b3b3b3" style:text-align-source="fix" style:repeat-content="false" fo:background-color="transparent" fo:border-left="none" fo:border-right="0.74pt solid #999999" fo:border-top="none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3" style:family="table-cell" style:parent-style-name="Default" style:data-style-name="N123">
      <style:table-cell-properties fo:border-bottom="0.74pt solid #b3b3b3" fo:background-color="#f2f2f2" style:text-align-source="fix" style:repeat-content="false" fo:border-left="none" fo:border-right="0.74pt solid #999999" fo:border-top="0.74pt solid #b3b3b3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4" style:family="table-cell" style:parent-style-name="Default" style:data-style-name="N123">
      <style:table-cell-properties fo:border-bottom="0.74pt solid #b3b3b3" style:text-align-source="fix" style:repeat-content="false" fo:background-color="transparent" fo:border-left="none" fo:border-right="0.74pt solid #999999" fo:border-top="0.74pt solid #b3b3b3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5" style:family="table-cell" style:parent-style-name="Default" style:data-style-name="N123">
      <style:table-cell-properties fo:border-bottom="0.74pt solid #b3b3b3" fo:background-color="#f2f2f2" style:text-align-source="fix" style:repeat-content="false" fo:border-left="none" fo:border-right="0.74pt solid #999999" fo:border-top="0.74pt solid #b3b3b3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6" style:family="table-cell" style:parent-style-name="Default" style:data-style-name="N123">
      <style:table-cell-properties fo:border-bottom="0.74pt solid #000000" fo:background-color="#f2f2f2" style:text-align-source="fix" style:repeat-content="false" fo:border-left="none" fo:border-right="0.74pt solid #999999" fo:border-top="0.74pt solid #b3b3b3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367" style:family="table-cell" style:parent-style-name="Default" style:data-style-name="N123">
      <style:table-cell-properties fo:border-bottom="0.74pt solid #000000" style:text-align-source="fix" style:repeat-content="false" fo:background-color="transparent" fo:border-left="none" fo:border-right="0.74pt solid #999999" fo:border-top="0.74pt solid #b3b3b3"/>
      <style:paragraph-properties fo:text-align="center" fo:margin-left="0cm"/>
      <style:map style:condition="cell-content()=&quot;+&quot;" style:apply-style-name="Grüner_20_Text" style:base-cell-address="'BKW Amortisation'.F2"/>
      <style:map style:condition="cell-content()=&quot;-&quot;" style:apply-style-name="Warning" style:base-cell-address="'BKW Amortisation'.F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9" style:family="table-cell" style:parent-style-name="Default">
      <style:text-properties fo:font-style="italic" style:font-style-asian="italic" style:font-style-complex="italic"/>
    </style:style>
    <style:style style:name="ce290" style:family="table-cell" style:parent-style-name="Default" style:data-style-name="N114">
      <style:table-cell-properties fo:border-bottom="0.74pt solid #b3b3b3" fo:background-color="#f2f2f2" fo:border-left="0.74pt solid #999999" fo:border-right="0.74pt solid #999999" fo:border-top="none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158" style:family="table-cell" style:parent-style-name="Default" style:data-style-name="N123">
      <style:table-cell-properties fo:border-bottom="0.74pt solid #000000" fo:background-color="transparent" fo:border-left="0.74pt solid #999999" fo:border-right="0.74pt solid #999999" fo:border-top="none"/>
    </style:style>
    <style:style style:name="ce159" style:family="table-cell" style:parent-style-name="Default" style:data-style-name="N123">
      <style:table-cell-properties fo:border-bottom="0.74pt solid #b3b3b3" fo:background-color="transparent" fo:border-left="0.74pt solid #999999" fo:border-right="0.74pt solid #999999" fo:border-top="none"/>
    </style:style>
    <style:style style:name="ce294" style:family="table-cell" style:parent-style-name="Default" style:data-style-name="N123">
      <style:table-cell-properties fo:border-bottom="0.74pt solid #b3b3b3" fo:background-color="#f2f2f2" fo:border-left="0.74pt solid #999999" fo:border-right="0.74pt solid #999999" fo:border-top="0.74pt solid #b3b3b3"/>
    </style:style>
    <style:style style:name="ce160" style:family="table-cell" style:parent-style-name="Default" style:data-style-name="N123">
      <style:table-cell-properties fo:border-bottom="0.74pt solid #b3b3b3" fo:background-color="transparent" fo:border-left="0.74pt solid #999999" fo:border-right="0.74pt solid #999999" fo:border-top="0.74pt solid #b3b3b3"/>
    </style:style>
    <style:style style:name="ce296" style:family="table-cell" style:parent-style-name="Default" style:data-style-name="N123">
      <style:table-cell-properties fo:border-bottom="0.74pt solid #000000" fo:background-color="#f2f2f2" fo:border-left="0.74pt solid #999999" fo:border-right="0.74pt solid #999999" fo:border-top="0.74pt solid #b3b3b3"/>
    </style:style>
    <style:style style:name="ce297" style:family="table-cell" style:parent-style-name="Default" style:data-style-name="N123">
      <style:table-cell-properties fo:border-bottom="0.74pt solid #b3b3b3" fo:background-color="#f2f2f2" fo:border-left="0.74pt solid #999999" fo:border-right="0.74pt solid #999999" fo:border-top="none"/>
    </style:style>
    <style:style style:name="ce162" style:family="table-cell" style:parent-style-name="Default" style:data-style-name="N11">
      <style:table-cell-properties fo:border-bottom="0.74pt solid #000000" fo:border-left="0.74pt solid #999999" fo:border-right="0.74pt solid #999999" fo:border-top="none"/>
    </style:style>
    <style:style style:name="ce163" style:family="table-cell" style:parent-style-name="Default" style:data-style-name="N11">
      <style:table-cell-properties fo:border-bottom="0.74pt solid #b3b3b3" fo:border-left="0.74pt solid #999999" fo:border-right="0.74pt solid #999999" fo:border-top="none"/>
    </style:style>
    <style:style style:name="ce300" style:family="table-cell" style:parent-style-name="Default" style:data-style-name="N11">
      <style:table-cell-properties fo:border-bottom="0.74pt solid #b3b3b3" fo:background-color="#f2f2f2" fo:border-left="0.74pt solid #999999" fo:border-right="0.74pt solid #999999" fo:border-top="0.74pt solid #b3b3b3"/>
    </style:style>
    <style:style style:name="ce164" style:family="table-cell" style:parent-style-name="Default" style:data-style-name="N11">
      <style:table-cell-properties fo:border-bottom="0.74pt solid #b3b3b3" fo:border-left="0.74pt solid #999999" fo:border-right="0.74pt solid #999999" fo:border-top="0.74pt solid #b3b3b3"/>
    </style:style>
    <style:style style:name="ce302" style:family="table-cell" style:parent-style-name="Default" style:data-style-name="N11">
      <style:table-cell-properties fo:border-bottom="0.74pt solid #000000" fo:background-color="#f2f2f2" fo:border-left="0.74pt solid #999999" fo:border-right="0.74pt solid #999999" fo:border-top="0.74pt solid #b3b3b3"/>
    </style:style>
    <style:style style:name="ce303" style:family="table-cell" style:parent-style-name="Default" style:data-style-name="N11">
      <style:table-cell-properties fo:border-bottom="0.74pt solid #b3b3b3" fo:background-color="#f2f2f2" fo:border-left="0.74pt solid #999999" fo:border-right="0.74pt solid #999999" fo:border-top="none"/>
    </style:style>
    <style:style style:name="ce165" style:family="table-cell" style:parent-style-name="Default">
      <style:table-cell-properties fo:border-bottom="none" fo:wrap-option="wrap" fo:border-left="0.74pt solid #999999" fo:border-right="0.74pt solid #999999" fo:border-top="none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>
      <style:table-cell-properties fo:border-bottom="none" fo:border-left="0.74pt solid #999999" fo:border-right="0.74pt solid #999999" fo:border-top="none"/>
    </style:style>
    <style:style style:name="ce168" style:family="table-cell" style:parent-style-name="Default">
      <style:table-cell-properties fo:border-bottom="0.74pt solid #000000" fo:background-color="#e6e6ff" style:text-align-source="fix" style:repeat-content="false" fo:border-left="0.74pt solid #999999" fo:border-right="0.74pt solid #999999" fo:border-top="none"/>
      <style:paragraph-properties fo:text-align="start" fo:margin-left="0cm"/>
    </style:style>
    <style:style style:name="ce169" style:family="table-cell" style:parent-style-name="Default">
      <style:table-cell-properties fo:border-bottom="none" fo:border-left="0.74pt solid #999999" fo:border-right="0.74pt solid #999999" fo:border-top="none"/>
      <style:text-properties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49" style:family="table-cell" style:parent-style-name="Default" style:data-style-name="N127">
      <style:table-cell-properties fo:border-bottom="0.74pt solid #000000" fo:background-color="#e6e6ff" fo:border-left="0.74pt solid #999999" fo:border-right="0.74pt solid #999999" fo:border-top="none"/>
    </style:style>
    <style:style style:name="ce17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cm"/>
      <style:text-properties fo:font-weight="bold" style:font-weight-asian="bold" style:font-weight-complex="bold"/>
    </style:style>
    <style:style style:name="ce393" style:family="table-cell" style:parent-style-name="Default" style:data-style-name="N123">
      <style:table-cell-properties fo:background-color="transparent" fo:border="none"/>
    </style:style>
    <style:style style:name="ce170" style:family="table-cell" style:parent-style-name="Default" style:data-style-name="N123">
      <style:table-cell-properties fo:border-bottom="0.74pt solid #000000" fo:background-color="#e6e6ff" fo:border-left="0.74pt solid #999999" fo:border-right="0.74pt solid #999999" fo:border-top="none"/>
    </style:style>
    <style:style style:name="ce172" style:family="table-cell" style:parent-style-name="Default" style:data-style-name="N114">
      <style:table-cell-properties fo:border-bottom="0.74pt solid #000000" fo:background-color="#e6e6ff" fo:border-left="0.74pt solid #999999" fo:border-right="0.74pt solid #999999" fo:border-top="none"/>
    </style:style>
    <style:style style:name="ce240" style:family="table-cell" style:parent-style-name="Default" style:data-style-name="N123">
      <style:table-cell-properties style:vertical-align="middle"/>
    </style:style>
    <style:style style:name="ce173" style:family="table-cell" style:parent-style-name="Default" style:data-style-name="N11">
      <style:table-cell-properties fo:border-bottom="0.74pt solid #000000" fo:background-color="#e6e6ff" fo:border-left="0.74pt solid #999999" fo:border-right="0.74pt solid #999999" fo:border-top="none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fill="none" draw:textarea-vertical-align="middle" draw:auto-grow-height="false" fo:min-height="6.387cm" fo:min-width="0.128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0.791cm" loext:decorative="false"/>
      <style:paragraph-properties style:writing-mode="lr-tb"/>
      <style:text-properties fo:color="#008000" loext:opacity="100%" style:font-name="Liberation Sans" fo:font-style="normal" fo:font-weight="bold" style:font-style-asian="normal" style:font-weight-asian="bold" style:font-style-complex="normal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000" loext:opacity="100%" style:font-name="Liberation Sans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008000" loext:opacity="100%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KW Amortisation" table:style-name="ta1">
        <office:forms form:automatic-focus="false" form:apply-design-mode="false"/>
        <table:shapes>
          <draw:frame draw:z-index="0" draw:style-name="gr1" draw:text-style-name="P1" svg:width="15.695cm" svg:height="4.901cm" svg:x="23.503cm" svg:y="8.213cm">
            <draw:object draw:notify-on-update-of-ranges="'BKW Amortisation'.B14:'BKW Amortisation'.B26 'BKW Amortisation'.E13:'BKW Amortisation'.E13 'BKW Amortisation'.E14:'BKW Amortisation'.E26 'BKW Amortisation'.C13:'BKW Amortisation'.C13 'BKW Amortisation'.C14:'BKW Amortisation'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3" draw:name="Form 1" draw:style-name="gr2" draw:text-style-name="P1" svg:width="0.356cm" svg:height="6.737cm" draw:transform="rotate (-1.57166899142089) translate (35.62cm 3.596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z-index="4" draw:name="Textrahmen 1" draw:style-name="gr3" draw:text-style-name="P2" svg:width="1.823cm" svg:height="0.791cm" svg:x="1.935cm" svg:y="10.44cm">
            <draw:text-box>
              <text:p><text:span text:style-name="T1">Inbetrieb-</text:span><text:span text:style-name="T1"><text:line-break/></text:span><text:span text:style-name="T1">nahm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row table:style-name="ro1">
          <table:table-cell/>
          <table:table-cell table:style-name="ce210" office:value-type="string" calcext:value-type="string" table:number-columns-spanned="3" table:number-rows-spanned="1">
            <text:p>Initiale Investitionen</text:p>
          </table:table-cell>
          <table:covered-table-cell table:number-columns-repeated="2" table:style-name="ce49"/>
          <table:table-cell table:style-name="ce138"/>
          <table:table-cell table:style-name="ce227"/>
          <table:table-cell table:style-name="ce210" office:value-type="string" calcext:value-type="string" table:number-columns-spanned="3" table:number-rows-spanned="1">
            <text:p>Nachträgliche Ausgaben</text:p>
          </table:table-cell>
          <table:covered-table-cell table:number-columns-repeated="2" table:style-name="ce49"/>
          <table:table-cell table:style-name="ce138" table:number-columns-repeated="3"/>
          <table:table-cell table:style-name="ce309" office:value-type="string" calcext:value-type="string" table:number-columns-spanned="4" table:number-rows-spanned="1">
            <text:p>Monatliche Mittelwerte</text:p>
          </table:table-cell>
          <table:covered-table-cell table:number-columns-repeated="3" table:style-name="ce49"/>
          <table:table-cell table:number-columns-repeated="5"/>
        </table:table-row>
        <table:table-row table:style-name="ro2">
          <table:table-cell/>
          <table:table-cell table:style-name="ce139" office:value-type="string" calcext:value-type="string">
            <text:p>Element</text:p>
          </table:table-cell>
          <table:table-cell table:style-name="ce141" office:value-type="string" calcext:value-type="string">
            <text:p>Datum</text:p>
          </table:table-cell>
          <table:table-cell table:style-name="ce141" office:value-type="string" calcext:value-type="string">
            <text:p>Preis</text:p>
          </table:table-cell>
          <table:table-cell/>
          <table:table-cell table:style-name="ce358"/>
          <table:table-cell table:style-name="ce139" office:value-type="string" calcext:value-type="string">
            <text:p>Element</text:p>
          </table:table-cell>
          <table:table-cell table:style-name="ce141" office:value-type="string" calcext:value-type="string">
            <text:p>Datum</text:p>
          </table:table-cell>
          <table:table-cell table:style-name="ce141" office:value-type="string" calcext:value-type="string">
            <text:p>Preis</text:p>
          </table:table-cell>
          <table:table-cell table:number-columns-repeated="3"/>
          <table:table-cell table:style-name="ce310" office:value-type="string" calcext:value-type="string">
            <text:p>Januar</text:p>
          </table:table-cell>
          <table:table-cell table:style-name="ce393" table:number-matrix-columns-spanned="1" table:number-matrix-rows-spanned="1" table:formula="of:=AVERAGE(IF(MONTH([.B$21:.B$1500])=1;[.E$21:.E$1500]))" office:value-type="currency" office:currency="kWh" office:value="13.11" calcext:value-type="currency">
            <text:p>13,11 kWh</text:p>
          </table:table-cell>
          <table:table-cell table:style-name="ce310" office:value-type="string" calcext:value-type="string">
            <text:p>Juli</text:p>
          </table:table-cell>
          <table:table-cell table:style-name="ce393" table:number-matrix-columns-spanned="1" table:number-matrix-rows-spanned="1" table:formula="of:=AVERAGE(IF(MONTH([.B$15:.B$1500])=7;[.E$15:.E$1500]))" office:value-type="currency" office:currency="kWh" office:value="99.2933333333333" calcext:value-type="currency">
            <text:p>99,29 kW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nele + WR</text:p>
          </table:table-cell>
          <table:table-cell table:style-name="ce123" office:value-type="date" office:date-value="2023-06-05" calcext:value-type="date">
            <text:p>05.06.23</text:p>
          </table:table-cell>
          <table:table-cell table:style-name="ce152" office:value-type="currency" office:currency="EUR" office:value="743.11" calcext:value-type="currency">
            <text:p>743,11 €</text:p>
          </table:table-cell>
          <table:table-cell/>
          <table:table-cell table:style-name="ce358"/>
          <table:table-cell table:style-name="ce289" office:value-type="string" calcext:value-type="string">
            <text:p>- keine -</text:p>
          </table:table-cell>
          <table:table-cell table:style-name="ce123"/>
          <table:table-cell table:style-name="ce152"/>
          <table:table-cell table:number-columns-repeated="3"/>
          <table:table-cell table:style-name="ce310" office:value-type="string" calcext:value-type="string">
            <text:p>Februar</text:p>
          </table:table-cell>
          <table:table-cell table:style-name="ce393" table:number-matrix-columns-spanned="1" table:number-matrix-rows-spanned="1" table:formula="of:=AVERAGE(IF(MONTH([.B$15:.B$1500])=2;[.E$15:.E$1500]))" office:value-type="currency" office:currency="kWh" office:value="25.8666666666667" calcext:value-type="currency">
            <text:p>25,87 kWh</text:p>
          </table:table-cell>
          <table:table-cell table:style-name="ce310" office:value-type="string" calcext:value-type="string">
            <text:p>August</text:p>
          </table:table-cell>
          <table:table-cell table:style-name="ce393" table:number-matrix-columns-spanned="1" table:number-matrix-rows-spanned="1" table:formula="of:=AVERAGE(IF(MONTH([.B$15:.B$1500])=8;[.E$15:.E$1500]))" office:value-type="currency" office:currency="kWh" office:value="89.1033333333333" calcext:value-type="currency">
            <text:p>89,10 kWh</text:p>
          </table:table-cell>
          <table:table-cell table:number-columns-repeated="5"/>
        </table:table-row>
        <table:table-row table:style-name="ro2">
          <table:table-cell/>
          <table:table-cell table:style-name="ce212" office:value-type="string" calcext:value-type="string">
            <text:p>Strommessgerät</text:p>
          </table:table-cell>
          <table:table-cell table:style-name="ce245" office:value-type="date" office:date-value="2023-06-09" calcext:value-type="date">
            <text:p>09.06.23</text:p>
          </table:table-cell>
          <table:table-cell table:style-name="ce258" office:value-type="currency" office:currency="EUR" office:value="34.95" calcext:value-type="currency">
            <text:p>34,95 €</text:p>
          </table:table-cell>
          <table:table-cell/>
          <table:table-cell table:style-name="ce358"/>
          <table:table-cell table:number-columns-repeated="6"/>
          <table:table-cell table:style-name="ce310" office:value-type="string" calcext:value-type="string">
            <text:p>März</text:p>
          </table:table-cell>
          <table:table-cell table:style-name="ce393" table:number-matrix-columns-spanned="1" table:number-matrix-rows-spanned="1" table:formula="of:=AVERAGE(IF(MONTH([.B$15:.B$1500])=3;[.E$15:.E$1500]))" office:value-type="currency" office:currency="kWh" office:value="58.3166666666667" calcext:value-type="currency">
            <text:p>58,32 kWh</text:p>
          </table:table-cell>
          <table:table-cell table:style-name="ce310" office:value-type="string" calcext:value-type="string">
            <text:p>September</text:p>
          </table:table-cell>
          <table:table-cell table:style-name="ce393" table:number-matrix-columns-spanned="1" table:number-matrix-rows-spanned="1" table:formula="of:=AVERAGE(IF(MONTH([.B$15:.B$1500])=9;[.E$15:.E$1500]))" office:value-type="currency" office:currency="kWh" office:value="65.2433333333333" calcext:value-type="currency">
            <text:p>65,24 kW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Kabel</text:p>
          </table:table-cell>
          <table:table-cell table:style-name="ce123" office:value-type="date" office:date-value="2023-06-10" calcext:value-type="date">
            <text:p>10.06.23</text:p>
          </table:table-cell>
          <table:table-cell table:style-name="ce152" office:value-type="currency" office:currency="EUR" office:value="27.76" calcext:value-type="currency">
            <text:p>27,76 €</text:p>
          </table:table-cell>
          <table:table-cell/>
          <table:table-cell table:style-name="ce358"/>
          <table:table-cell table:number-columns-repeated="6"/>
          <table:table-cell table:style-name="ce310" office:value-type="string" calcext:value-type="string">
            <text:p>April</text:p>
          </table:table-cell>
          <table:table-cell table:style-name="ce393" table:number-matrix-columns-spanned="1" table:number-matrix-rows-spanned="1" table:formula="of:=AVERAGE(IF(MONTH([.B$15:.B$1500])=4;[.E$15:.E$1500]))" office:value-type="currency" office:currency="kWh" office:value="85.5833333333333" calcext:value-type="currency">
            <text:p>85,58 kWh</text:p>
          </table:table-cell>
          <table:table-cell table:style-name="ce310" office:value-type="string" calcext:value-type="string">
            <text:p>Oktober</text:p>
          </table:table-cell>
          <table:table-cell table:style-name="ce393" table:number-matrix-columns-spanned="1" table:number-matrix-rows-spanned="1" table:formula="of:=AVERAGE(IF(MONTH([.B$15:.B$1500])=10;[.E$15:.E$1500]))" office:value-type="currency" office:currency="kWh" office:value="30.7266666666667" calcext:value-type="currency">
            <text:p>30,73 kWh</text:p>
          </table:table-cell>
          <table:table-cell table:number-columns-repeated="5"/>
        </table:table-row>
        <table:table-row table:style-name="ro2">
          <table:table-cell/>
          <table:table-cell table:style-name="ce212" office:value-type="string" calcext:value-type="string">
            <text:p>Dichtmittel</text:p>
          </table:table-cell>
          <table:table-cell table:style-name="ce245" office:value-type="date" office:date-value="2023-06-10" calcext:value-type="date">
            <text:p>10.06.23</text:p>
          </table:table-cell>
          <table:table-cell table:style-name="ce258" office:value-type="currency" office:currency="EUR" office:value="6.7" calcext:value-type="currency">
            <text:p>6,70 €</text:p>
          </table:table-cell>
          <table:table-cell/>
          <table:table-cell table:style-name="ce358"/>
          <table:table-cell table:number-columns-repeated="6"/>
          <table:table-cell table:style-name="ce310" office:value-type="string" calcext:value-type="string">
            <text:p>Mai</text:p>
          </table:table-cell>
          <table:table-cell table:style-name="ce393" table:number-matrix-columns-spanned="1" table:number-matrix-rows-spanned="1" table:formula="of:=AVERAGE(IF(MONTH([.B$15:.B$1500])=5;[.E$15:.E$1500]))" office:value-type="currency" office:currency="kWh" office:value="72.24" calcext:value-type="currency">
            <text:p>72,24 kWh</text:p>
          </table:table-cell>
          <table:table-cell table:style-name="ce310" office:value-type="string" calcext:value-type="string">
            <text:p>November</text:p>
          </table:table-cell>
          <table:table-cell table:style-name="ce393" table:number-matrix-columns-spanned="1" table:number-matrix-rows-spanned="1" table:formula="of:=AVERAGE(IF(MONTH([.B$15:.B$1500])=11;[.E$15:.E$1500]))" office:value-type="currency" office:currency="kWh" office:value="15.94" calcext:value-type="currency">
            <text:p>15,94 kW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hrauben</text:p>
          </table:table-cell>
          <table:table-cell table:style-name="ce123" office:value-type="date" office:date-value="2023-06-14" calcext:value-type="date">
            <text:p>14.06.23</text:p>
          </table:table-cell>
          <table:table-cell table:style-name="ce152" office:value-type="currency" office:currency="EUR" office:value="8.24" calcext:value-type="currency">
            <text:p>8,24 €</text:p>
          </table:table-cell>
          <table:table-cell/>
          <table:table-cell table:style-name="ce358"/>
          <table:table-cell table:number-columns-repeated="6"/>
          <table:table-cell table:style-name="ce310" office:value-type="string" calcext:value-type="string">
            <text:p>Juni</text:p>
          </table:table-cell>
          <table:table-cell table:style-name="ce393" table:number-matrix-columns-spanned="1" table:number-matrix-rows-spanned="1" table:formula="of:=AVERAGE(IF(MONTH([.B$21:.B$1500])=6;[.E$21:.E$1500]))" office:value-type="currency" office:currency="kWh" office:value="103.795" calcext:value-type="currency">
            <text:p>103,80 kWh</text:p>
          </table:table-cell>
          <table:table-cell table:style-name="ce310" office:value-type="string" calcext:value-type="string">
            <text:p>Dezember</text:p>
          </table:table-cell>
          <table:table-cell table:style-name="ce393" table:number-matrix-columns-spanned="1" table:number-matrix-rows-spanned="1" table:formula="of:=AVERAGE(IF(MONTH([.B$15:.B$1500])=12;[.E$15:.E$1500]))" office:value-type="currency" office:currency="kWh" office:value="10.5066666666667" calcext:value-type="currency">
            <text:p>10,51 kWh</text:p>
          </table:table-cell>
          <table:table-cell table:number-columns-repeated="5"/>
        </table:table-row>
        <table:table-row table:style-name="ro2">
          <table:table-cell/>
          <table:table-cell table:style-name="ce212" office:value-type="string" calcext:value-type="string">
            <text:p>Förderung</text:p>
          </table:table-cell>
          <table:table-cell table:style-name="ce245" office:value-type="date" office:date-value="2023-06-16" calcext:value-type="date">
            <text:p>16.06.23</text:p>
          </table:table-cell>
          <table:table-cell table:style-name="ce258" office:value-type="currency" office:currency="EUR" office:value="-222.93" calcext:value-type="currency">
            <text:p>-222,93 €</text:p>
          </table:table-cell>
          <table:table-cell/>
          <table:table-cell table:style-name="ce358"/>
          <table:table-cell table:number-columns-repeated="15"/>
        </table:table-row>
        <table:table-row table:style-name="ro3">
          <table:table-cell table:number-columns-repeated="3"/>
          <table:table-cell table:style-name="ce231"/>
          <table:table-cell/>
          <table:table-cell table:style-name="ce358"/>
          <table:table-cell table:number-columns-repeated="6"/>
          <table:table-cell table:style-name="ce203" office:value-type="string" calcext:value-type="string" table:number-columns-spanned="3" table:number-rows-spanned="1">
            <text:p>Monatsmittel:</text:p>
          </table:table-cell>
          <table:covered-table-cell table:number-columns-repeated="2"/>
          <table:table-cell table:style-name="ce240" table:formula="of:=AVERAGE([.E21:.E1500])" office:value-type="currency" office:currency="kWh" office:value="54.4394285714286" calcext:value-type="currency">
            <text:p>54,44 kWh</text:p>
          </table:table-cell>
          <table:table-cell table:number-columns-repeated="5"/>
        </table:table-row>
        <table:table-row table:style-name="ro2">
          <table:table-cell/>
          <table:table-cell table:style-name="ce213" office:value-type="string" calcext:value-type="string">
            <text:p>SUMME</text:p>
          </table:table-cell>
          <table:table-cell table:style-name="ce213"/>
          <table:table-cell table:style-name="ce259" table:formula="of:=SUM([.D3:.D9])" office:value-type="currency" office:currency="EUR" office:value="597.83" calcext:value-type="currency">
            <text:p>597,83 €</text:p>
          </table:table-cell>
          <table:table-cell/>
          <table:table-cell table:style-name="ce358"/>
          <table:table-cell table:style-name="ce213" office:value-type="string" calcext:value-type="string">
            <text:p>SUMME</text:p>
          </table:table-cell>
          <table:table-cell table:style-name="ce213"/>
          <table:table-cell table:style-name="ce259" table:formula="of:=SUM([.I3:.I9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203" office:value-type="string" calcext:value-type="string" table:number-columns-spanned="3" table:number-rows-spanned="2">
            <text:p>Jahresmittel:</text:p>
          </table:table-cell>
          <table:covered-table-cell table:number-columns-repeated="2" table:style-name="ce203"/>
          <table:table-cell table:style-name="ce240" table:formula="of:=[.P9]*12" office:value-type="currency" office:currency="kWh" office:value="653.273142857143" calcext:value-type="currency" table:number-columns-spanned="1" table:number-rows-spanned="2">
            <text:p>653,27 kWh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358"/>
          <table:table-cell table:number-columns-repeated="6"/>
          <table:covered-table-cell table:number-columns-repeated="3" table:style-name="ce203"/>
          <table:covered-table-cell/>
          <table:table-cell table:number-columns-repeated="5"/>
        </table:table-row>
        <table:table-header-rows>
          <table:table-row table:style-name="ro4">
            <table:table-cell/>
            <table:table-cell table:style-name="ce29" office:value-type="string" calcext:value-type="string" table:number-columns-spanned="7" table:number-rows-spanned="1">
              <text:p>Amortisation</text:p>
            </table:table-cell>
            <table:covered-table-cell table:number-columns-repeated="3"/>
            <table:covered-table-cell table:style-name="ce359"/>
            <table:covered-table-cell table:number-columns-repeated="2"/>
            <table:table-cell table:style-name="ce161" office:value-type="string" calcext:value-type="string" table:number-columns-spanned="2" table:number-rows-spanned="1">
              <text:p>Sonstige Statistiken</text:p>
            </table:table-cell>
            <table:covered-table-cell/>
            <table:table-cell/>
            <table:table-cell table:style-name="ce29" office:value-type="string" calcext:value-type="string" table:number-columns-spanned="6" table:number-rows-spanned="1">
              <text:p>Zusammenfassung / Jahres-Statistik</text:p>
            </table:table-cell>
            <table:covered-table-cell table:number-columns-repeated="5"/>
            <table:table-cell/>
            <table:table-cell table:style-name="ce29"/>
            <table:table-cell table:number-columns-repeated="2"/>
          </table:table-row>
          <table:table-row table:style-name="ro5">
            <table:table-cell table:style-name="ce206"/>
            <table:table-cell table:style-name="ce119" office:value-type="string" calcext:value-type="string">
              <text:p>Monat</text:p>
            </table:table-cell>
            <table:table-cell table:style-name="ce146" office:value-type="string" calcext:value-type="string">
              <text:p>Verbrauch</text:p>
              <text:p>Netz</text:p>
            </table:table-cell>
            <table:table-cell table:style-name="ce146" office:value-type="string" calcext:value-type="string">
              <text:p>Preis je kWh</text:p>
            </table:table-cell>
            <table:table-cell table:style-name="ce272" office:value-type="string" calcext:value-type="string" table:number-columns-spanned="2" table:number-rows-spanned="1">
              <text:p>Erzeugung</text:p>
              <text:p>PV-Anlage</text:p>
            </table:table-cell>
            <table:covered-table-cell table:style-name="ce360"/>
            <table:table-cell table:style-name="ce146" office:value-type="string" calcext:value-type="string">
              <text:p>Ersparnis</text:p>
            </table:table-cell>
            <table:table-cell table:style-name="ce146" office:value-type="string" calcext:value-type="string">
              <text:p>Amortisation</text:p>
            </table:table-cell>
            <table:table-cell table:style-name="ce146" office:value-type="string" calcext:value-type="string">
              <text:p>durchs. Erzeugung/ Tag</text:p>
            </table:table-cell>
            <table:table-cell table:style-name="ce146" office:value-type="string" calcext:value-type="string">
              <text:p>Anteil PV</text:p>
            </table:table-cell>
            <table:table-cell table:style-name="ce165"/>
            <table:table-cell table:style-name="ce119" office:value-type="string" calcext:value-type="string">
              <text:p>Jahr</text:p>
            </table:table-cell>
            <table:table-cell table:style-name="ce146" office:value-type="string" calcext:value-type="string">
              <text:p>Verbrauch</text:p>
              <text:p>Netz</text:p>
            </table:table-cell>
            <table:table-cell table:style-name="ce146" office:value-type="string" calcext:value-type="string">
              <text:p>Erzeugung</text:p>
              <text:p>PV-Anlage</text:p>
            </table:table-cell>
            <table:table-cell table:style-name="ce146" office:value-type="string" calcext:value-type="string">
              <text:p>Ersparnis</text:p>
            </table:table-cell>
            <table:table-cell table:style-name="ce146" office:value-type="string" calcext:value-type="string">
              <text:p>durchs. Erzeugung/ Tag</text:p>
            </table:table-cell>
            <table:table-cell table:style-name="ce146" office:value-type="string" calcext:value-type="string">
              <text:p>Anteil PV</text:p>
            </table:table-cell>
            <table:table-cell table:style-name="ce140"/>
            <table:table-cell table:style-name="ce120" table:number-columns-repeated="2"/>
            <table:table-cell/>
          </table:table-row>
        </table:table-header-rows>
        <table:table-row table:style-name="ro2">
          <table:table-cell table:style-name="ce207"/>
          <table:table-cell table:style-name="ce122"/>
          <table:table-cell table:style-name="ce147"/>
          <table:table-cell table:style-name="ce154"/>
          <table:table-cell table:style-name="ce273"/>
          <table:table-cell table:style-name="ce361"/>
          <table:table-cell table:style-name="ce154" table:number-columns-repeated="2"/>
          <table:table-cell table:style-name="ce158"/>
          <table:table-cell table:style-name="ce162"/>
          <table:table-cell table:style-name="ce166"/>
          <table:table-cell table:style-name="ce168" office:value-type="float" office:value="2022" calcext:value-type="float">
            <text:p>2022</text:p>
          </table:table-cell>
          <table:table-cell table:style-name="ce249" office:value-type="currency" office:currency="kWh" office:value="1901.6" calcext:value-type="currency">
            <text:p>1.901,6 kWh</text:p>
          </table:table-cell>
          <table:table-cell table:style-name="ce170"/>
          <table:table-cell table:style-name="ce172"/>
          <table:table-cell table:style-name="ce170"/>
          <table:table-cell table:style-name="ce173"/>
          <table:table-cell table:style-name="ce140"/>
          <table:table-cell table:style-name="ce120"/>
          <table:table-cell table:number-columns-repeated="2"/>
        </table:table-row>
        <table:table-row table:style-name="ro2">
          <table:table-cell table:style-name="ce208" office:value-type="float" office:value="2023" calcext:value-type="float" table:number-columns-spanned="1" table:number-rows-spanned="12">
            <text:p>2023</text:p>
          </table:table-cell>
          <table:table-cell table:style-name="ce222" office:value-type="date" office:date-value="2023-01-31" calcext:value-type="date">
            <text:p>Jan '23</text:p>
          </table:table-cell>
          <table:table-cell table:style-name="ce233" office:value-type="currency" office:currency="kWh" office:value="165.900000000009" calcext:value-type="currency">
            <text:p>165,9 kWh</text:p>
          </table:table-cell>
          <table:table-cell table:style-name="ce241" office:value-type="currency" office:currency="EUR" office:value="0.2737" calcext:value-type="currency">
            <text:p>0,27 €</text:p>
          </table:table-cell>
          <table:table-cell table:style-name="ce274"/>
          <table:table-cell table:style-name="ce362"/>
          <table:table-cell table:style-name="ce155" table:number-columns-repeated="2"/>
          <table:table-cell table:style-name="ce159"/>
          <table:table-cell table:style-name="ce163"/>
          <table:table-cell table:style-name="ce167"/>
          <table:table-cell table:style-name="ce169"/>
          <table:table-cell table:style-name="ce171" table:number-columns-repeated="5"/>
          <table:table-cell table:style-name="ce140"/>
          <table:table-cell table:style-name="ce120"/>
          <table:table-cell table:number-columns-repeated="2"/>
        </table:table-row>
        <table:table-row table:style-name="ro2">
          <table:covered-table-cell table:style-name="ce209"/>
          <table:table-cell table:style-name="ce218" office:value-type="date" office:date-value="2023-02-28" calcext:value-type="date">
            <text:p>Feb '23</text:p>
          </table:table-cell>
          <table:table-cell table:style-name="ce250" office:value-type="currency" office:currency="kWh" office:value="143.399999999994" calcext:value-type="currency">
            <text:p>143,4 kWh</text:p>
          </table:table-cell>
          <table:table-cell table:style-name="ce262" office:value-type="currency" office:currency="EUR" office:value="0.2737" calcext:value-type="currency">
            <text:p>0,27 €</text:p>
          </table:table-cell>
          <table:table-cell table:style-name="ce275"/>
          <table:table-cell table:style-name="ce363"/>
          <table:table-cell table:style-name="ce266" table:number-columns-repeated="2"/>
          <table:table-cell table:style-name="ce294"/>
          <table:table-cell table:style-name="ce300"/>
          <table:table-cell table:style-name="ce167"/>
          <table:table-cell table:style-name="ce169"/>
          <table:table-cell table:style-name="ce171" table:number-columns-repeated="5"/>
          <table:table-cell table:style-name="ce140"/>
          <table:table-cell table:style-name="ce120"/>
          <table:table-cell table:number-columns-repeated="2"/>
        </table:table-row>
        <table:table-row table:style-name="ro2">
          <table:covered-table-cell table:style-name="ce209"/>
          <table:table-cell table:style-name="ce223" office:value-type="date" office:date-value="2023-03-31" calcext:value-type="date">
            <text:p>Mär '23</text:p>
          </table:table-cell>
          <table:table-cell table:style-name="ce234" office:value-type="currency" office:currency="kWh" office:value="162.899999999994" calcext:value-type="currency">
            <text:p>162,9 kWh</text:p>
          </table:table-cell>
          <table:table-cell table:style-name="ce242" office:value-type="currency" office:currency="EUR" office:value="0.2737" calcext:value-type="currency">
            <text:p>0,27 €</text:p>
          </table:table-cell>
          <table:table-cell table:style-name="ce276"/>
          <table:table-cell table:style-name="ce364"/>
          <table:table-cell table:style-name="ce156" table:number-columns-repeated="2"/>
          <table:table-cell table:style-name="ce160"/>
          <table:table-cell table:style-name="ce164"/>
          <table:table-cell table:style-name="ce167"/>
          <table:table-cell table:style-name="ce169"/>
          <table:table-cell table:style-name="ce171" table:number-columns-repeated="5"/>
          <table:table-cell table:style-name="ce140"/>
          <table:table-cell table:style-name="ce120"/>
          <table:table-cell table:number-columns-repeated="2"/>
        </table:table-row>
        <table:table-row table:style-name="ro2">
          <table:covered-table-cell table:style-name="ce209"/>
          <table:table-cell table:style-name="ce218" office:value-type="date" office:date-value="2023-04-30" calcext:value-type="date">
            <text:p>Apr '23</text:p>
          </table:table-cell>
          <table:table-cell table:style-name="ce250" office:value-type="currency" office:currency="kWh" office:value="162.400000000009" calcext:value-type="currency">
            <text:p>162,4 kWh</text:p>
          </table:table-cell>
          <table:table-cell table:style-name="ce262" office:value-type="currency" office:currency="EUR" office:value="0.2737" calcext:value-type="currency">
            <text:p>0,27 €</text:p>
          </table:table-cell>
          <table:table-cell table:style-name="ce275"/>
          <table:table-cell table:style-name="ce363"/>
          <table:table-cell table:style-name="ce266" table:number-columns-repeated="2"/>
          <table:table-cell table:style-name="ce294"/>
          <table:table-cell table:style-name="ce300"/>
          <table:table-cell table:style-name="ce167"/>
          <table:table-cell table:style-name="ce169"/>
          <table:table-cell table:style-name="ce171" table:number-columns-repeated="5"/>
          <table:table-cell table:style-name="ce140"/>
          <table:table-cell table:style-name="ce120"/>
          <table:table-cell table:number-columns-repeated="2"/>
        </table:table-row>
        <table:table-row table:style-name="ro2">
          <table:covered-table-cell table:style-name="ce209"/>
          <table:table-cell table:style-name="ce223" office:value-type="date" office:date-value="2023-05-31" calcext:value-type="date">
            <text:p>Mai '23</text:p>
          </table:table-cell>
          <table:table-cell table:style-name="ce234" office:value-type="currency" office:currency="kWh" office:value="149.399999999994" calcext:value-type="currency">
            <text:p>149,4 kWh</text:p>
          </table:table-cell>
          <table:table-cell table:style-name="ce242" office:value-type="currency" office:currency="EUR" office:value="0.2737" calcext:value-type="currency">
            <text:p>0,27 €</text:p>
          </table:table-cell>
          <table:table-cell table:style-name="ce276"/>
          <table:table-cell table:style-name="ce364"/>
          <table:table-cell table:style-name="ce156" table:number-columns-repeated="2"/>
          <table:table-cell table:style-name="ce160"/>
          <table:table-cell table:style-name="ce164"/>
          <table:table-cell table:style-name="ce167"/>
          <table:table-cell table:style-name="ce169"/>
          <table:table-cell table:style-name="ce171" table:number-columns-repeated="5"/>
          <table:table-cell table:style-name="ce140"/>
          <table:table-cell table:style-name="ce120"/>
          <table:table-cell table:number-columns-repeated="2"/>
        </table:table-row>
        <table:table-row table:style-name="ro2">
          <table:covered-table-cell table:style-name="ce209"/>
          <table:table-cell table:style-name="ce220" office:value-type="date" office:date-value="2023-06-01" calcext:value-type="date">
            <text:p>Jun '23</text:p>
          </table:table-cell>
          <table:table-cell table:style-name="ce252" office:value-type="currency" office:currency="kWh" office:value="43.7" calcext:value-type="currency">
            <text:p>43,7 kWh</text:p>
          </table:table-cell>
          <table:table-cell table:style-name="ce264" office:value-type="currency" office:currency="EUR" office:value="0.3844" calcext:value-type="currency">
            <text:p>0,38 €</text:p>
          </table:table-cell>
          <table:table-cell table:style-name="ce275" office:value-type="currency" office:currency="kWh" office:value="70.3" calcext:value-type="currency">
            <text:p>70,30 kWh</text:p>
          </table:table-cell>
          <table:table-cell table:style-name="ce365" table:formula="of:=IF([.E20]&gt;[.$N$7];&quot;+&quot;;&quot;-&quot;)" office:value-type="string" office:string-value="-" calcext:value-type="string">
            <text:p>-</text:p>
          </table:table-cell>
          <table:table-cell table:style-name="ce266" table:formula="of:=[.E20]*[.D20]" office:value-type="currency" office:currency="EUR" office:value="27.02332" calcext:value-type="currency">
            <text:p>27,02 €</text:p>
          </table:table-cell>
          <table:table-cell table:style-name="ce266" table:formula="of:=([.$D$10]-[.G20])*-1" office:value-type="currency" office:currency="EUR" office:value="-570.80668" calcext:value-type="currency">
            <text:p>-570,81 €</text:p>
          </table:table-cell>
          <table:table-cell table:style-name="ce294" table:formula="of:=[.E20]/17" office:value-type="currency" office:currency="kWh" office:value="4.13529411764706" calcext:value-type="currency">
            <text:p>4,14 kWh</text:p>
          </table:table-cell>
          <table:table-cell table:style-name="ce300" table:formula="of:=1/([.C20]+[.E20])*[.E20]" office:value-type="percentage" office:value="0.616666666666667" calcext:value-type="percentage">
            <text:p>61,67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142" office:value-type="date" office:date-value="2023-07-31" calcext:value-type="date">
            <text:p>Jul '23</text:p>
          </table:table-cell>
          <table:table-cell table:style-name="ce149" office:value-type="currency" office:currency="kWh" office:value="38.1" calcext:value-type="currency">
            <text:p>38,1 kWh</text:p>
          </table:table-cell>
          <table:table-cell table:style-name="ce156" office:value-type="currency" office:currency="EUR" office:value="0.3844" calcext:value-type="currency">
            <text:p>0,38 €</text:p>
          </table:table-cell>
          <table:table-cell table:style-name="ce276" office:value-type="currency" office:currency="kWh" office:value="104.05" calcext:value-type="currency">
            <text:p>104,05 kWh</text:p>
          </table:table-cell>
          <table:table-cell table:style-name="ce364" table:formula="of:=IF([.E21]&gt;[.$P$2];&quot;+&quot;;&quot;-&quot;)" office:value-type="string" office:string-value="+" calcext:value-type="string">
            <text:p>+</text:p>
          </table:table-cell>
          <table:table-cell table:style-name="ce156" table:formula="of:=[.E21]*[.D21]" office:value-type="currency" office:currency="EUR" office:value="39.99682" calcext:value-type="currency">
            <text:p>40,00 €</text:p>
          </table:table-cell>
          <table:table-cell table:style-name="ce156" table:formula="of:=[.H20]+[.G21]" office:value-type="currency" office:currency="EUR" office:value="-530.80986" calcext:value-type="currency">
            <text:p>-530,81 €</text:p>
          </table:table-cell>
          <table:table-cell table:style-name="ce160" table:formula="of:=[.E21]/(IF(AND(YEAR([.B21])=YEAR(NOW());MONTH([.B21])=MONTH(NOW()));DAY(NOW());ORG.OPENOFFICE.DAYSINMONTH([.B21])))" office:value-type="currency" office:currency="kWh" office:value="3.35645161290323" calcext:value-type="currency">
            <text:p>3,36 kWh</text:p>
          </table:table-cell>
          <table:table-cell table:style-name="ce164" table:formula="of:=1/([.C21]+[.E21])*[.E21]" office:value-type="percentage" office:value="0.731973267674991" calcext:value-type="percentage">
            <text:p>73,20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3-08-31" calcext:value-type="date">
            <text:p>Aug '23</text:p>
          </table:table-cell>
          <table:table-cell table:style-name="ce252" office:value-type="currency" office:currency="kWh" office:value="63.6" calcext:value-type="currency">
            <text:p>63,6 kWh</text:p>
          </table:table-cell>
          <table:table-cell table:style-name="ce266" office:value-type="currency" office:currency="EUR" office:value="0.3844" calcext:value-type="currency">
            <text:p>0,38 €</text:p>
          </table:table-cell>
          <table:table-cell table:style-name="ce275" office:value-type="currency" office:currency="kWh" office:value="85.61" calcext:value-type="currency">
            <text:p>85,61 kWh</text:p>
          </table:table-cell>
          <table:table-cell table:style-name="ce363" table:formula="of:=IF([.E22]&gt;[.$P$3];&quot;+&quot;;&quot;-&quot;)" office:value-type="string" office:string-value="-" calcext:value-type="string">
            <text:p>-</text:p>
          </table:table-cell>
          <table:table-cell table:style-name="ce266" table:formula="of:=[.E22]*[.D22]" office:value-type="currency" office:currency="EUR" office:value="32.908484" calcext:value-type="currency">
            <text:p>32,91 €</text:p>
          </table:table-cell>
          <table:table-cell table:style-name="ce266" table:formula="of:=[.H21]+[.G22]" office:value-type="currency" office:currency="EUR" office:value="-497.901376" calcext:value-type="currency">
            <text:p>-497,90 €</text:p>
          </table:table-cell>
          <table:table-cell table:style-name="ce294" table:formula="of:=[.E22]/(IF(AND(YEAR([.B22])=YEAR(NOW());MONTH([.B22])=MONTH(NOW()));DAY(NOW());ORG.OPENOFFICE.DAYSINMONTH([.B22])))" office:value-type="currency" office:currency="kWh" office:value="2.76161290322581" calcext:value-type="currency">
            <text:p>2,76 kWh</text:p>
          </table:table-cell>
          <table:table-cell table:style-name="ce300" table:formula="of:=1/([.C22]+[.E22])*[.E22]" office:value-type="percentage" office:value="0.573755110247302" calcext:value-type="percentage">
            <text:p>57,38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142" office:value-type="date" office:date-value="2023-09-30" calcext:value-type="date">
            <text:p>Sep '23</text:p>
          </table:table-cell>
          <table:table-cell table:style-name="ce149" office:value-type="currency" office:currency="kWh" office:value="33.6" calcext:value-type="currency">
            <text:p>33,6 kWh</text:p>
          </table:table-cell>
          <table:table-cell table:style-name="ce156" office:value-type="currency" office:currency="EUR" office:value="0.3844" calcext:value-type="currency">
            <text:p>0,38 €</text:p>
          </table:table-cell>
          <table:table-cell table:style-name="ce276" office:value-type="currency" office:currency="kWh" office:value="82.34" calcext:value-type="currency">
            <text:p>82,34 kWh</text:p>
          </table:table-cell>
          <table:table-cell table:style-name="ce364" table:formula="of:=IF([.E23]&gt;[.$P$4];&quot;+&quot;;&quot;-&quot;)" office:value-type="string" office:string-value="+" calcext:value-type="string">
            <text:p>+</text:p>
          </table:table-cell>
          <table:table-cell table:style-name="ce156" table:formula="of:=[.E23]*[.D23]" office:value-type="currency" office:currency="EUR" office:value="31.651496" calcext:value-type="currency">
            <text:p>31,65 €</text:p>
          </table:table-cell>
          <table:table-cell table:style-name="ce156" table:formula="of:=[.H22]+[.G23]" office:value-type="currency" office:currency="EUR" office:value="-466.24988" calcext:value-type="currency">
            <text:p>-466,25 €</text:p>
          </table:table-cell>
          <table:table-cell table:style-name="ce160" table:formula="of:=[.E23]/(IF(AND(YEAR([.B23])=YEAR(NOW());MONTH([.B23])=MONTH(NOW()));DAY(NOW());ORG.OPENOFFICE.DAYSINMONTH([.B23])))" office:value-type="currency" office:currency="kWh" office:value="2.74466666666667" calcext:value-type="currency">
            <text:p>2,74 kWh</text:p>
          </table:table-cell>
          <table:table-cell table:style-name="ce164" table:formula="of:=1/([.C23]+[.E23])*[.E23]" office:value-type="percentage" office:value="0.710194928411247" calcext:value-type="percentage">
            <text:p>71,02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3-10-31" calcext:value-type="date">
            <text:p>Okt '23</text:p>
          </table:table-cell>
          <table:table-cell table:style-name="ce252" office:value-type="currency" office:currency="kWh" office:value="119.7" calcext:value-type="currency">
            <text:p>119,7 kWh</text:p>
          </table:table-cell>
          <table:table-cell table:style-name="ce266" office:value-type="currency" office:currency="EUR" office:value="0.3844" calcext:value-type="currency">
            <text:p>0,38 €</text:p>
          </table:table-cell>
          <table:table-cell table:style-name="ce275" office:value-type="currency" office:currency="kWh" office:value="36.93" calcext:value-type="currency">
            <text:p>36,93 kWh</text:p>
          </table:table-cell>
          <table:table-cell table:style-name="ce363" table:formula="of:=IF([.E24]&gt;[.$P$5];&quot;+&quot;;&quot;-&quot;)" office:value-type="string" office:string-value="+" calcext:value-type="string">
            <text:p>+</text:p>
          </table:table-cell>
          <table:table-cell table:style-name="ce266" table:formula="of:=[.E24]*[.D24]" office:value-type="currency" office:currency="EUR" office:value="14.195892" calcext:value-type="currency">
            <text:p>14,20 €</text:p>
          </table:table-cell>
          <table:table-cell table:style-name="ce266" table:formula="of:=[.H23]+[.G24]" office:value-type="currency" office:currency="EUR" office:value="-452.053988" calcext:value-type="currency">
            <text:p>-452,05 €</text:p>
          </table:table-cell>
          <table:table-cell table:style-name="ce294" table:formula="of:=[.E24]/(IF(AND(YEAR([.B24])=YEAR(NOW());MONTH([.B24])=MONTH(NOW()));DAY(NOW());ORG.OPENOFFICE.DAYSINMONTH([.B24])))" office:value-type="currency" office:currency="kWh" office:value="1.19129032258065" calcext:value-type="currency">
            <text:p>1,19 kWh</text:p>
          </table:table-cell>
          <table:table-cell table:style-name="ce300" table:formula="of:=1/([.C24]+[.E24])*[.E24]" office:value-type="percentage" office:value="0.235778586477686" calcext:value-type="percentage">
            <text:p>23,58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142" office:value-type="date" office:date-value="2023-11-30" calcext:value-type="date">
            <text:p>Nov '23</text:p>
          </table:table-cell>
          <table:table-cell table:style-name="ce149" office:value-type="currency" office:currency="kWh" office:value="150.1" calcext:value-type="currency">
            <text:p>150,1 kWh</text:p>
          </table:table-cell>
          <table:table-cell table:style-name="ce156" office:value-type="currency" office:currency="EUR" office:value="0.3844" calcext:value-type="currency">
            <text:p>0,38 €</text:p>
          </table:table-cell>
          <table:table-cell table:style-name="ce276" office:value-type="currency" office:currency="kWh" office:value="14.25" calcext:value-type="currency">
            <text:p>14,25 kWh</text:p>
          </table:table-cell>
          <table:table-cell table:style-name="ce364" table:formula="of:=IF([.E25]&gt;[.$P$6];&quot;+&quot;;&quot;-&quot;)" office:value-type="string" office:string-value="-" calcext:value-type="string">
            <text:p>-</text:p>
          </table:table-cell>
          <table:table-cell table:style-name="ce156" table:formula="of:=[.E25]*[.D25]" office:value-type="currency" office:currency="EUR" office:value="5.4777" calcext:value-type="currency">
            <text:p>5,48 €</text:p>
          </table:table-cell>
          <table:table-cell table:style-name="ce156" table:formula="of:=[.H24]+[.G25]" office:value-type="currency" office:currency="EUR" office:value="-446.576288" calcext:value-type="currency">
            <text:p>-446,58 €</text:p>
          </table:table-cell>
          <table:table-cell table:style-name="ce160" table:formula="of:=[.E25]/(IF(AND(YEAR([.B25])=YEAR(NOW());MONTH([.B25])=MONTH(NOW()));DAY(NOW());ORG.OPENOFFICE.DAYSINMONTH([.B25])))" office:value-type="currency" office:currency="kWh" office:value="0.475" calcext:value-type="currency">
            <text:p>0,48 kWh</text:p>
          </table:table-cell>
          <table:table-cell table:style-name="ce164" table:formula="of:=1/([.C25]+[.E25])*[.E25]" office:value-type="percentage" office:value="0.0867052023121387" calcext:value-type="percentage">
            <text:p>8,67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238" office:value-type="date" office:date-value="2023-12-31" calcext:value-type="date">
            <text:p>Dez '23</text:p>
          </table:table-cell>
          <table:table-cell table:style-name="ce254" office:value-type="currency" office:currency="kWh" office:value="159.2" calcext:value-type="currency">
            <text:p>159,2 kWh</text:p>
          </table:table-cell>
          <table:table-cell table:style-name="ce267" office:value-type="currency" office:currency="EUR" office:value="0.3844" calcext:value-type="currency">
            <text:p>0,38 €</text:p>
          </table:table-cell>
          <table:table-cell table:style-name="ce277" office:value-type="currency" office:currency="kWh" office:value="7.97" calcext:value-type="currency">
            <text:p>7,97 kWh</text:p>
          </table:table-cell>
          <table:table-cell table:style-name="ce366" table:formula="of:=IF([.E26]&gt;[.$P$7];&quot;+&quot;;&quot;-&quot;)" office:value-type="string" office:string-value="-" calcext:value-type="string">
            <text:p>-</text:p>
          </table:table-cell>
          <table:table-cell table:style-name="ce267" table:formula="of:=[.E26]*[.D26]" office:value-type="currency" office:currency="EUR" office:value="3.063668" calcext:value-type="currency">
            <text:p>3,06 €</text:p>
          </table:table-cell>
          <table:table-cell table:style-name="ce267" table:formula="of:=[.H25]+[.G26]" office:value-type="currency" office:currency="EUR" office:value="-443.51262" calcext:value-type="currency">
            <text:p>-443,51 €</text:p>
          </table:table-cell>
          <table:table-cell table:style-name="ce296" table:formula="of:=[.E26]/(IF(AND(YEAR([.B26])=YEAR(NOW());MONTH([.B26])=MONTH(NOW()));DAY(NOW());ORG.OPENOFFICE.DAYSINMONTH([.B26])))" office:value-type="currency" office:currency="kWh" office:value="0.257096774193548" calcext:value-type="currency">
            <text:p>0,26 kWh</text:p>
          </table:table-cell>
          <table:table-cell table:style-name="ce302" table:formula="of:=1/([.C26]+[.E26])*[.E26]" office:value-type="percentage" office:value="0.0476760184243584" calcext:value-type="percentage">
            <text:p>4,77 %</text:p>
          </table:table-cell>
          <table:table-cell table:style-name="ce167"/>
          <table:table-cell table:style-name="ce168" office:value-type="float" office:value="2023" calcext:value-type="float">
            <text:p>2023</text:p>
          </table:table-cell>
          <table:table-cell table:style-name="ce249" table:formula="of:=SUM([.C15:.C26])" office:value-type="currency" office:currency="kWh" office:value="1392" calcext:value-type="currency">
            <text:p>1.392,0 kWh</text:p>
          </table:table-cell>
          <table:table-cell table:style-name="ce170" table:formula="of:=SUM([.E14:.E26])" office:value-type="currency" office:currency="kWh" office:value="401.45" calcext:value-type="currency">
            <text:p>401,45 kWh</text:p>
          </table:table-cell>
          <table:table-cell table:style-name="ce172" table:formula="of:=SUM([.G14:.G26])" office:value-type="currency" office:currency="EUR" office:value="154.31738" calcext:value-type="currency">
            <text:p>154,32 €</text:p>
          </table:table-cell>
          <table:table-cell table:style-name="ce170" table:formula="of:=[.N26]/IF([.L26]=YEAR(NOW());ROUNDUP(NOW()-DATE([.L26];1;1));198)" office:value-type="currency" office:currency="kWh" office:value="2.02752525252525" calcext:value-type="currency">
            <text:p>2,03 kWh</text:p>
          </table:table-cell>
          <table:table-cell table:style-name="ce173" table:formula="of:=1/([.M26]+[.N26])*[.N26]" office:value-type="percentage" office:value="0.223842315091026" calcext:value-type="percentage">
            <text:p>22,38 %</text:p>
          </table:table-cell>
          <table:table-cell table:number-columns-repeated="4"/>
        </table:table-row>
        <table:table-row table:style-name="ro2">
          <table:table-cell table:style-name="ce208" office:value-type="float" office:value="2024" calcext:value-type="float" table:number-columns-spanned="1" table:number-rows-spanned="12">
            <text:p>2024</text:p>
          </table:table-cell>
          <table:table-cell table:style-name="ce128" office:value-type="date" office:date-value="2024-01-31" calcext:value-type="date">
            <text:p>Jan '24</text:p>
          </table:table-cell>
          <table:table-cell table:style-name="ce148" office:value-type="currency" office:currency="kWh" office:value="142.5" calcext:value-type="currency">
            <text:p>142,5 kWh</text:p>
          </table:table-cell>
          <table:table-cell table:style-name="ce268" office:value-type="currency" office:currency="EUR" office:value="0.3451" calcext:value-type="currency">
            <text:p>0,35 €</text:p>
          </table:table-cell>
          <table:table-cell table:style-name="ce274" office:value-type="currency" office:currency="kWh" office:value="12.94" calcext:value-type="currency">
            <text:p>12,94 kWh</text:p>
          </table:table-cell>
          <table:table-cell table:style-name="ce362" table:formula="of:=IF([.E27]&gt;[.$N$2];&quot;+&quot;;&quot;-&quot;)" office:value-type="string" office:string-value="-" calcext:value-type="string">
            <text:p>-</text:p>
          </table:table-cell>
          <table:table-cell table:style-name="ce155" table:formula="of:=[.E27]*[.D27]" office:value-type="currency" office:currency="EUR" office:value="4.465594" calcext:value-type="currency">
            <text:p>4,47 €</text:p>
          </table:table-cell>
          <table:table-cell table:style-name="ce155" table:formula="of:=[.H26]+[.G27]" office:value-type="currency" office:currency="EUR" office:value="-439.047026" calcext:value-type="currency">
            <text:p>-439,05 €</text:p>
          </table:table-cell>
          <table:table-cell table:style-name="ce159" table:formula="of:=[.E27]/(IF(AND(YEAR([.B27])=YEAR(NOW());MONTH([.B27])=MONTH(NOW()));DAY(NOW());ORG.OPENOFFICE.DAYSINMONTH([.B27])))" office:value-type="currency" office:currency="kWh" office:value="0.41741935483871" calcext:value-type="currency">
            <text:p>0,42 kWh</text:p>
          </table:table-cell>
          <table:table-cell table:style-name="ce163" table:formula="of:=1/([.C27]+[.E27])*[.E27]" office:value-type="percentage" office:value="0.0832475553268142" calcext:value-type="percentage">
            <text:p>8,32 %</text:p>
          </table:table-cell>
          <table:table-cell table:style-name="ce167"/>
          <table:table-cell table:style-name="ce169">
            <draw:frame draw:z-index="1" draw:style-name="gr1" draw:text-style-name="P1" svg:width="15.695cm" svg:height="4.901cm" svg:x="0.034cm" svg:y="0.072cm">
              <draw:object draw:notify-on-update-of-ranges="'BKW Amortisation'.B27:'BKW Amortisation'.B38 'BKW Amortisation'.E13:'BKW Amortisation'.E13 'BKW Amortisation'.E27:'BKW Amortisation'.E38 'BKW Amortisation'.C13:'BKW Amortisation'.C13 'BKW Amortisation'.C27:'BKW Amortisation'.C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4-02-28" calcext:value-type="date">
            <text:p>Feb '24</text:p>
          </table:table-cell>
          <table:table-cell table:style-name="ce252" office:value-type="currency" office:currency="kWh" office:value="129.5" calcext:value-type="currency">
            <text:p>129,5 kWh</text:p>
          </table:table-cell>
          <table:table-cell table:style-name="ce266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21.87" calcext:value-type="currency">
            <text:p>21,87 kWh</text:p>
          </table:table-cell>
          <table:table-cell table:style-name="ce363" table:formula="of:=IF([.E28]&gt;[.$N$3];&quot;+&quot;;&quot;-&quot;)" office:value-type="string" office:string-value="-" calcext:value-type="string">
            <text:p>-</text:p>
          </table:table-cell>
          <table:table-cell table:style-name="ce290" table:formula="of:=[.E28]*[.D28]" office:value-type="currency" office:currency="EUR" office:value="7.547337" calcext:value-type="currency">
            <text:p>7,55 €</text:p>
          </table:table-cell>
          <table:table-cell table:style-name="ce290" table:formula="of:=[.H27]+[.G28]" office:value-type="currency" office:currency="EUR" office:value="-431.499689" calcext:value-type="currency">
            <text:p>-431,50 €</text:p>
          </table:table-cell>
          <table:table-cell table:style-name="ce294" table:formula="of:=[.E28]/(IF(AND(YEAR([.B28])=YEAR(NOW());MONTH([.B28])=MONTH(NOW()));DAY(NOW());ORG.OPENOFFICE.DAYSINMONTH([.B28])))" office:value-type="currency" office:currency="kWh" office:value="0.754137931034483" calcext:value-type="currency">
            <text:p>0,75 kWh</text:p>
          </table:table-cell>
          <table:table-cell table:style-name="ce303" table:formula="of:=1/([.C28]+[.E28])*[.E28]" office:value-type="percentage" office:value="0.144480412234921" calcext:value-type="percentage">
            <text:p>14,45 %</text:p>
          </table:table-cell>
          <table:table-cell table:style-name="ce167"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4-03-27" calcext:value-type="date">
            <text:p>Mär '24</text:p>
          </table:table-cell>
          <table:table-cell table:style-name="ce149" office:value-type="currency" office:currency="kWh" office:value="106.8" calcext:value-type="currency">
            <text:p>106,8 kWh</text:p>
          </table:table-cell>
          <table:table-cell table:style-name="ce1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46.66" calcext:value-type="currency">
            <text:p>46,66 kWh</text:p>
          </table:table-cell>
          <table:table-cell table:style-name="ce364" table:formula="of:=IF([.E29]&gt;[.$N$4];&quot;+&quot;;&quot;-&quot;)" office:value-type="string" office:string-value="-" calcext:value-type="string">
            <text:p>-</text:p>
          </table:table-cell>
          <table:table-cell table:style-name="ce155" table:formula="of:=[.E29]*[.D29]" office:value-type="currency" office:currency="EUR" office:value="16.102366" calcext:value-type="currency">
            <text:p>16,10 €</text:p>
          </table:table-cell>
          <table:table-cell table:style-name="ce155" table:formula="of:=[.H28]+[.G29]" office:value-type="currency" office:currency="EUR" office:value="-415.397323" calcext:value-type="currency">
            <text:p>-415,40 €</text:p>
          </table:table-cell>
          <table:table-cell table:style-name="ce160" table:formula="of:=[.E29]/(IF(AND(YEAR([.B29])=YEAR(NOW());MONTH([.B29])=MONTH(NOW()));DAY(NOW());ORG.OPENOFFICE.DAYSINMONTH([.B29])))" office:value-type="currency" office:currency="kWh" office:value="1.50516129032258" calcext:value-type="currency">
            <text:p>1,51 kWh</text:p>
          </table:table-cell>
          <table:table-cell table:style-name="ce163" table:formula="of:=1/([.C29]+[.E29])*[.E29]" office:value-type="percentage" office:value="0.304053173465398" calcext:value-type="percentage">
            <text:p>30,41 %</text:p>
          </table:table-cell>
          <table:table-cell table:style-name="ce167"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4-04-24" calcext:value-type="date">
            <text:p>Apr '24</text:p>
          </table:table-cell>
          <table:table-cell table:style-name="ce252" office:value-type="currency" office:currency="kWh" office:value="77.8" calcext:value-type="currency">
            <text:p>77,8 kWh</text:p>
          </table:table-cell>
          <table:table-cell table:style-name="ce266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65.87" calcext:value-type="currency">
            <text:p>65,87 kWh</text:p>
          </table:table-cell>
          <table:table-cell table:style-name="ce363" table:formula="of:=IF([.E30]&gt;[.$N$5];&quot;+&quot;;&quot;-&quot;)" office:value-type="string" office:string-value="-" calcext:value-type="string">
            <text:p>-</text:p>
          </table:table-cell>
          <table:table-cell table:style-name="ce290" table:formula="of:=[.E30]*[.D30]" office:value-type="currency" office:currency="EUR" office:value="22.731737" calcext:value-type="currency">
            <text:p>22,73 €</text:p>
          </table:table-cell>
          <table:table-cell table:style-name="ce290" table:formula="of:=[.H29]+[.G30]" office:value-type="currency" office:currency="EUR" office:value="-392.665586" calcext:value-type="currency">
            <text:p>-392,67 €</text:p>
          </table:table-cell>
          <table:table-cell table:style-name="ce294" table:formula="of:=[.E30]/(IF(AND(YEAR([.B30])=YEAR(NOW());MONTH([.B30])=MONTH(NOW()));DAY(NOW());ORG.OPENOFFICE.DAYSINMONTH([.B30])))" office:value-type="currency" office:currency="kWh" office:value="2.19566666666667" calcext:value-type="currency">
            <text:p>2,20 kWh</text:p>
          </table:table-cell>
          <table:table-cell table:style-name="ce303" table:formula="of:=1/([.C30]+[.E30])*[.E30]" office:value-type="percentage" office:value="0.458481241734531" calcext:value-type="percentage">
            <text:p>45,85 %</text:p>
          </table:table-cell>
          <table:table-cell table:style-name="ce167"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4-05-22" calcext:value-type="date">
            <text:p>Mai '24</text:p>
          </table:table-cell>
          <table:table-cell table:style-name="ce149" office:value-type="currency" office:currency="kWh" office:value="47.2" calcext:value-type="currency">
            <text:p>47,2 kWh</text:p>
          </table:table-cell>
          <table:table-cell table:style-name="ce1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94.25" calcext:value-type="currency">
            <text:p>94,25 kWh</text:p>
          </table:table-cell>
          <table:table-cell table:style-name="ce364" table:formula="of:=IF([.E31]&gt;[.$N$6];&quot;+&quot;;&quot;-&quot;)" office:value-type="string" office:string-value="+" calcext:value-type="string">
            <text:p>+</text:p>
          </table:table-cell>
          <table:table-cell table:style-name="ce155" table:formula="of:=[.E31]*[.D31]" office:value-type="currency" office:currency="EUR" office:value="32.525675" calcext:value-type="currency">
            <text:p>32,53 €</text:p>
          </table:table-cell>
          <table:table-cell table:style-name="ce155" table:formula="of:=[.H30]+[.G31]" office:value-type="currency" office:currency="EUR" office:value="-360.139911" calcext:value-type="currency">
            <text:p>-360,14 €</text:p>
          </table:table-cell>
          <table:table-cell table:style-name="ce160" table:formula="of:=[.E31]/(IF(AND(YEAR([.B31])=YEAR(NOW());MONTH([.B31])=MONTH(NOW()));DAY(NOW());ORG.OPENOFFICE.DAYSINMONTH([.B31])))" office:value-type="currency" office:currency="kWh" office:value="3.04032258064516" calcext:value-type="currency">
            <text:p>3,04 kWh</text:p>
          </table:table-cell>
          <table:table-cell table:style-name="ce163" table:formula="of:=1/([.C31]+[.E31])*[.E31]" office:value-type="percentage" office:value="0.666313184870979" calcext:value-type="percentage">
            <text:p>66,63 %</text:p>
          </table:table-cell>
          <table:table-cell table:style-name="ce167"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4-06-19" calcext:value-type="date">
            <text:p>Jun '24</text:p>
          </table:table-cell>
          <table:table-cell table:style-name="ce252" office:value-type="currency" office:currency="kWh" office:value="38" calcext:value-type="currency">
            <text:p>38,0 kWh</text:p>
          </table:table-cell>
          <table:table-cell table:style-name="ce266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96.79" calcext:value-type="currency">
            <text:p>96,79 kWh</text:p>
          </table:table-cell>
          <table:table-cell table:style-name="ce363" table:formula="of:=IF([.E32]&gt;[.$N$7];&quot;+&quot;;&quot;-&quot;)" office:value-type="string" office:string-value="-" calcext:value-type="string">
            <text:p>-</text:p>
          </table:table-cell>
          <table:table-cell table:style-name="ce290" table:formula="of:=[.E32]*[.D32]" office:value-type="currency" office:currency="EUR" office:value="33.402229" calcext:value-type="currency">
            <text:p>33,40 €</text:p>
          </table:table-cell>
          <table:table-cell table:style-name="ce290" table:formula="of:=[.H31]+[.G32]" office:value-type="currency" office:currency="EUR" office:value="-326.737682" calcext:value-type="currency">
            <text:p>-326,74 €</text:p>
          </table:table-cell>
          <table:table-cell table:style-name="ce294" table:formula="of:=[.E32]/(IF(AND(YEAR([.B32])=YEAR(NOW());MONTH([.B32])=MONTH(NOW()));DAY(NOW());ORG.OPENOFFICE.DAYSINMONTH([.B32])))" office:value-type="currency" office:currency="kWh" office:value="3.22633333333333" calcext:value-type="currency">
            <text:p>3,23 kWh</text:p>
          </table:table-cell>
          <table:table-cell table:style-name="ce303" table:formula="of:=1/([.C32]+[.E32])*[.E32]" office:value-type="percentage" office:value="0.718079976259366" calcext:value-type="percentage">
            <text:p>71,81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4-07-17" calcext:value-type="date">
            <text:p>Jul '24</text:p>
          </table:table-cell>
          <table:table-cell table:style-name="ce149" office:value-type="currency" office:currency="kWh" office:value="38.6" calcext:value-type="currency">
            <text:p>38,6 kWh</text:p>
          </table:table-cell>
          <table:table-cell table:style-name="ce1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101.63" calcext:value-type="currency">
            <text:p>101,63 kWh</text:p>
          </table:table-cell>
          <table:table-cell table:style-name="ce364" table:formula="of:=IF([.E33]&gt;[.$P$2];&quot;+&quot;;&quot;-&quot;)" office:value-type="string" office:string-value="+" calcext:value-type="string">
            <text:p>+</text:p>
          </table:table-cell>
          <table:table-cell table:style-name="ce155" table:formula="of:=[.E33]*[.D33]" office:value-type="currency" office:currency="EUR" office:value="35.072513" calcext:value-type="currency">
            <text:p>35,07 €</text:p>
          </table:table-cell>
          <table:table-cell table:style-name="ce155" table:formula="of:=[.H32]+[.G33]" office:value-type="currency" office:currency="EUR" office:value="-291.665169" calcext:value-type="currency">
            <text:p>-291,67 €</text:p>
          </table:table-cell>
          <table:table-cell table:style-name="ce160" table:formula="of:=[.E33]/(IF(AND(YEAR([.B33])=YEAR(NOW());MONTH([.B33])=MONTH(NOW()));DAY(NOW());ORG.OPENOFFICE.DAYSINMONTH([.B33])))" office:value-type="currency" office:currency="kWh" office:value="3.27838709677419" calcext:value-type="currency">
            <text:p>3,28 kWh</text:p>
          </table:table-cell>
          <table:table-cell table:style-name="ce163" table:formula="of:=1/([.C33]+[.E33])*[.E33]" office:value-type="percentage" office:value="0.72473793054268" calcext:value-type="percentage">
            <text:p>72,47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4-08-14" calcext:value-type="date">
            <text:p>Aug '24</text:p>
          </table:table-cell>
          <table:table-cell table:style-name="ce252" office:value-type="currency" office:currency="kWh" office:value="29.6" calcext:value-type="currency">
            <text:p>29,6 kWh</text:p>
          </table:table-cell>
          <table:table-cell table:style-name="ce266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100.6" calcext:value-type="currency">
            <text:p>100,60 kWh</text:p>
          </table:table-cell>
          <table:table-cell table:style-name="ce363" table:formula="of:=IF([.E34]&gt;[.$P$3];&quot;+&quot;;&quot;-&quot;)" office:value-type="string" office:string-value="+" calcext:value-type="string">
            <text:p>+</text:p>
          </table:table-cell>
          <table:table-cell table:style-name="ce290" table:formula="of:=[.E34]*[.D34]" office:value-type="currency" office:currency="EUR" office:value="34.71706" calcext:value-type="currency">
            <text:p>34,72 €</text:p>
          </table:table-cell>
          <table:table-cell table:style-name="ce290" table:formula="of:=[.H33]+[.G34]" office:value-type="currency" office:currency="EUR" office:value="-256.948109" calcext:value-type="currency">
            <text:p>-256,95 €</text:p>
          </table:table-cell>
          <table:table-cell table:style-name="ce294" table:formula="of:=[.E34]/(IF(AND(YEAR([.B34])=YEAR(NOW());MONTH([.B34])=MONTH(NOW()));DAY(NOW());ORG.OPENOFFICE.DAYSINMONTH([.B34])))" office:value-type="currency" office:currency="kWh" office:value="3.24516129032258" calcext:value-type="currency">
            <text:p>3,25 kWh</text:p>
          </table:table-cell>
          <table:table-cell table:style-name="ce303" table:formula="of:=1/([.C34]+[.E34])*[.E34]" office:value-type="percentage" office:value="0.772657450076805" calcext:value-type="percentage">
            <text:p>77,27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4-09-11" calcext:value-type="date">
            <text:p>Sep '24</text:p>
          </table:table-cell>
          <table:table-cell table:style-name="ce149" office:value-type="currency" office:currency="kWh" office:value="114.6" calcext:value-type="currency">
            <text:p>114,6 kWh</text:p>
          </table:table-cell>
          <table:table-cell table:style-name="ce1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58.09" calcext:value-type="currency">
            <text:p>58,09 kWh</text:p>
          </table:table-cell>
          <table:table-cell table:style-name="ce364" table:formula="of:=IF([.E35]&gt;[.$P$4];&quot;+&quot;;&quot;-&quot;)" office:value-type="string" office:string-value="-" calcext:value-type="string">
            <text:p>-</text:p>
          </table:table-cell>
          <table:table-cell table:style-name="ce155" table:formula="of:=[.E35]*[.D35]" office:value-type="currency" office:currency="EUR" office:value="20.046859" calcext:value-type="currency">
            <text:p>20,05 €</text:p>
          </table:table-cell>
          <table:table-cell table:style-name="ce155" table:formula="of:=[.H34]+[.G35]" office:value-type="currency" office:currency="EUR" office:value="-236.90125" calcext:value-type="currency">
            <text:p>-236,90 €</text:p>
          </table:table-cell>
          <table:table-cell table:style-name="ce160" table:formula="of:=[.E35]/(IF(AND(YEAR([.B35])=YEAR(NOW());MONTH([.B35])=MONTH(NOW()));DAY(NOW());ORG.OPENOFFICE.DAYSINMONTH([.B35])))" office:value-type="currency" office:currency="kWh" office:value="1.93633333333333" calcext:value-type="currency">
            <text:p>1,94 kWh</text:p>
          </table:table-cell>
          <table:table-cell table:style-name="ce163" table:formula="of:=1/([.C35]+[.E35])*[.E35]" office:value-type="percentage" office:value="0.33638311425097" calcext:value-type="percentage">
            <text:p>33,64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4-10-09" calcext:value-type="date">
            <text:p>Okt '24</text:p>
          </table:table-cell>
          <table:table-cell table:style-name="ce252" office:value-type="currency" office:currency="kWh" office:value="116.5" calcext:value-type="currency">
            <text:p>116,5 kWh</text:p>
          </table:table-cell>
          <table:table-cell table:style-name="ce266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33.05" calcext:value-type="currency">
            <text:p>33,05 kWh</text:p>
          </table:table-cell>
          <table:table-cell table:style-name="ce363" table:formula="of:=IF([.E36]&gt;[.$P$5];&quot;+&quot;;&quot;-&quot;)" office:value-type="string" office:string-value="+" calcext:value-type="string">
            <text:p>+</text:p>
          </table:table-cell>
          <table:table-cell table:style-name="ce290" table:formula="of:=[.E36]*[.D36]" office:value-type="currency" office:currency="EUR" office:value="11.405555" calcext:value-type="currency">
            <text:p>11,41 €</text:p>
          </table:table-cell>
          <table:table-cell table:style-name="ce290" table:formula="of:=[.H35]+[.G36]" office:value-type="currency" office:currency="EUR" office:value="-225.495695" calcext:value-type="currency">
            <text:p>-225,50 €</text:p>
          </table:table-cell>
          <table:table-cell table:style-name="ce294" table:formula="of:=[.E36]/(IF(AND(YEAR([.B36])=YEAR(NOW());MONTH([.B36])=MONTH(NOW()));DAY(NOW());ORG.OPENOFFICE.DAYSINMONTH([.B36])))" office:value-type="currency" office:currency="kWh" office:value="1.06612903225806" calcext:value-type="currency">
            <text:p>1,07 kWh</text:p>
          </table:table-cell>
          <table:table-cell table:style-name="ce303" table:formula="of:=1/([.C36]+[.E36])*[.E36]" office:value-type="percentage" office:value="0.220996322300234" calcext:value-type="percentage">
            <text:p>22,10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4-11-06" calcext:value-type="date">
            <text:p>Nov '24</text:p>
          </table:table-cell>
          <table:table-cell table:style-name="ce149" office:value-type="currency" office:currency="kWh" office:value="142.5" calcext:value-type="currency">
            <text:p>142,5 kWh</text:p>
          </table:table-cell>
          <table:table-cell table:style-name="ce1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15.97" calcext:value-type="currency">
            <text:p>15,97 kWh</text:p>
          </table:table-cell>
          <table:table-cell table:style-name="ce364" table:formula="of:=IF([.E37]&gt;[.$P$6];&quot;+&quot;;&quot;-&quot;)" office:value-type="string" office:string-value="+" calcext:value-type="string">
            <text:p>+</text:p>
          </table:table-cell>
          <table:table-cell table:style-name="ce155" table:formula="of:=[.E37]*[.D37]" office:value-type="currency" office:currency="EUR" office:value="5.511247" calcext:value-type="currency">
            <text:p>5,51 €</text:p>
          </table:table-cell>
          <table:table-cell table:style-name="ce155" table:formula="of:=[.H36]+[.G37]" office:value-type="currency" office:currency="EUR" office:value="-219.984448" calcext:value-type="currency">
            <text:p>-219,98 €</text:p>
          </table:table-cell>
          <table:table-cell table:style-name="ce160" table:formula="of:=[.E37]/(IF(AND(YEAR([.B37])=YEAR(NOW());MONTH([.B37])=MONTH(NOW()));DAY(NOW());ORG.OPENOFFICE.DAYSINMONTH([.B37])))" office:value-type="currency" office:currency="kWh" office:value="0.532333333333333" calcext:value-type="currency">
            <text:p>0,53 kWh</text:p>
          </table:table-cell>
          <table:table-cell table:style-name="ce163" table:formula="of:=1/([.C37]+[.E37])*[.E37]" office:value-type="percentage" office:value="0.100776172146148" calcext:value-type="percentage">
            <text:p>10,08 %</text:p>
          </table:table-cell>
          <table:table-cell table:style-name="ce167" table:number-columns-repeated="7"/>
          <table:table-cell table:number-columns-repeated="4"/>
        </table:table-row>
        <table:table-row table:style-name="ro2">
          <table:covered-table-cell table:style-name="ce209"/>
          <table:table-cell table:style-name="ce238" office:value-type="date" office:date-value="2024-12-04" calcext:value-type="date">
            <text:p>Dez '24</text:p>
          </table:table-cell>
          <table:table-cell table:style-name="ce254" office:value-type="currency" office:currency="kWh" office:value="177.1" calcext:value-type="currency">
            <text:p>177,1 kWh</text:p>
          </table:table-cell>
          <table:table-cell table:style-name="ce267" office:value-type="currency" office:currency="EUR" office:value="0.3451" calcext:value-type="currency">
            <text:p>0,35 €</text:p>
          </table:table-cell>
          <table:table-cell table:style-name="ce277" office:value-type="currency" office:currency="kWh" office:value="10.05" calcext:value-type="currency">
            <text:p>10,05 kWh</text:p>
          </table:table-cell>
          <table:table-cell table:style-name="ce366" table:formula="of:=IF([.E38]&gt;[.$P$7];&quot;+&quot;;&quot;-&quot;)" office:value-type="string" office:string-value="-" calcext:value-type="string">
            <text:p>-</text:p>
          </table:table-cell>
          <table:table-cell table:style-name="ce267" table:formula="of:=[.E38]*[.D38]" office:value-type="currency" office:currency="EUR" office:value="3.468255" calcext:value-type="currency">
            <text:p>3,47 €</text:p>
          </table:table-cell>
          <table:table-cell table:style-name="ce267" table:formula="of:=[.H37]+[.G38]" office:value-type="currency" office:currency="EUR" office:value="-216.516193" calcext:value-type="currency">
            <text:p>-216,52 €</text:p>
          </table:table-cell>
          <table:table-cell table:style-name="ce296" table:formula="of:=[.E38]/(IF(AND(YEAR([.B38])=YEAR(NOW());MONTH([.B38])=MONTH(NOW()));DAY(NOW());ORG.OPENOFFICE.DAYSINMONTH([.B38])))" office:value-type="currency" office:currency="kWh" office:value="0.324193548387097" calcext:value-type="currency">
            <text:p>0,32 kWh</text:p>
          </table:table-cell>
          <table:table-cell table:style-name="ce302" table:formula="of:=1/([.C38]+[.E38])*[.E38]" office:value-type="percentage" office:value="0.0537002404488378" calcext:value-type="percentage">
            <text:p>5,37 %</text:p>
          </table:table-cell>
          <table:table-cell table:style-name="ce167"/>
          <table:table-cell table:style-name="ce168" office:value-type="float" office:value="2024" calcext:value-type="float">
            <text:p>2024</text:p>
            <draw:frame draw:z-index="2" draw:style-name="gr1" draw:text-style-name="P1" svg:width="15.695cm" svg:height="4.901cm" svg:x="0.01cm" svg:y="0.443cm">
              <draw:object draw:notify-on-update-of-ranges="'BKW Amortisation'.B39:'BKW Amortisation'.B50 'BKW Amortisation'.E13:'BKW Amortisation'.E13 'BKW Amortisation'.E39:'BKW Amortisation'.E50 'BKW Amortisation'.C13:'BKW Amortisation'.C13 'BKW Amortisation'.C39:'BKW Amortisation'.C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49" table:formula="of:=SUM([.C27:.C38])" office:value-type="currency" office:currency="kWh" office:value="1160.7" calcext:value-type="currency">
            <text:p>1.160,7 kWh</text:p>
          </table:table-cell>
          <table:table-cell table:style-name="ce170" table:formula="of:=SUM([.E27:.E38])" office:value-type="currency" office:currency="kWh" office:value="657.77" calcext:value-type="currency">
            <text:p>657,77 kWh</text:p>
          </table:table-cell>
          <table:table-cell table:style-name="ce172" table:formula="of:=SUM([.G27:.G38])" office:value-type="currency" office:currency="EUR" office:value="226.996427" calcext:value-type="currency">
            <text:p>227,00 €</text:p>
          </table:table-cell>
          <table:table-cell table:style-name="ce170" table:formula="of:=[.N38]/IF([.L38]=YEAR(NOW());ROUNDUP(NOW()-DATE([.L38];1;1));ORG.OPENOFFICE.DAYSINYEAR(DATE([.L38];1;1)))" office:value-type="currency" office:currency="kWh" office:value="1.79718579234973" calcext:value-type="currency">
            <text:p>1,80 kWh</text:p>
          </table:table-cell>
          <table:table-cell table:style-name="ce173" table:formula="of:=1/([.M38]+[.N38])*[.N38]" office:value-type="percentage" office:value="0.361716167987374" calcext:value-type="percentage">
            <text:p>36,17 %</text:p>
          </table:table-cell>
          <table:table-cell table:number-columns-repeated="4"/>
        </table:table-row>
        <table:table-row table:style-name="ro2">
          <table:table-cell table:style-name="ce208" office:value-type="float" office:value="2025" calcext:value-type="float" table:number-columns-spanned="1" table:number-rows-spanned="12">
            <text:p>2025</text:p>
          </table:table-cell>
          <table:table-cell table:style-name="ce128" office:value-type="date" office:date-value="2025-01-31" calcext:value-type="date">
            <text:p>Jan '25</text:p>
          </table:table-cell>
          <table:table-cell table:style-name="ce148" office:value-type="currency" office:currency="kWh" office:value="149.9" calcext:value-type="currency">
            <text:p>149,9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4" office:value-type="currency" office:currency="kWh" office:value="12.99" calcext:value-type="currency">
            <text:p>12,99 kWh</text:p>
          </table:table-cell>
          <table:table-cell table:style-name="ce362" table:formula="of:=IF([.E39]&gt;[.$N$2];&quot;+&quot;;&quot;-&quot;)" office:value-type="string" office:string-value="-" calcext:value-type="string">
            <text:p>-</text:p>
          </table:table-cell>
          <table:table-cell table:style-name="ce155" table:formula="of:=[.E39]*[.D39]" office:value-type="currency" office:currency="EUR" office:value="4.482849" calcext:value-type="currency">
            <text:p>4,48 €</text:p>
          </table:table-cell>
          <table:table-cell table:style-name="ce155" table:formula="of:=[.H38]+[.G39]" office:value-type="currency" office:currency="EUR" office:value="-212.033344" calcext:value-type="currency">
            <text:p>-212,03 €</text:p>
          </table:table-cell>
          <table:table-cell table:style-name="ce159" table:formula="of:=[.E39]/(IF(AND(YEAR([.B39])=YEAR(NOW());MONTH([.B39])=MONTH(NOW()));DAY(NOW());ORG.OPENOFFICE.DAYSINMONTH([.B39])))" office:value-type="currency" office:currency="kWh" office:value="0.419032258064516" calcext:value-type="currency">
            <text:p>0,42 kWh</text:p>
          </table:table-cell>
          <table:table-cell table:style-name="ce163" table:formula="of:=1/([.C39]+[.E39])*[.E39]" office:value-type="percentage" office:value="0.0797470685738842" calcext:value-type="percentage">
            <text:p>7,97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5-02-28" calcext:value-type="date">
            <text:p>Feb '25</text:p>
          </table:table-cell>
          <table:table-cell table:style-name="ce252" office:value-type="currency" office:currency="kWh" office:value="129.1" calcext:value-type="currency">
            <text:p>129,1 kWh</text:p>
          </table:table-cell>
          <table:table-cell table:style-name="ce271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29.83" calcext:value-type="currency">
            <text:p>29,83 kWh</text:p>
          </table:table-cell>
          <table:table-cell table:style-name="ce363" table:formula="of:=IF([.E40]&gt;[.$N$3];&quot;+&quot;;&quot;-&quot;)" office:value-type="string" office:string-value="+" calcext:value-type="string">
            <text:p>+</text:p>
          </table:table-cell>
          <table:table-cell table:style-name="ce290" table:formula="of:=[.E40]*[.D40]" office:value-type="currency" office:currency="EUR" office:value="10.294333" calcext:value-type="currency">
            <text:p>10,29 €</text:p>
          </table:table-cell>
          <table:table-cell table:style-name="ce290" table:formula="of:=[.H39]+[.G40]" office:value-type="currency" office:currency="EUR" office:value="-201.739011" calcext:value-type="currency">
            <text:p>-201,74 €</text:p>
          </table:table-cell>
          <table:table-cell table:style-name="ce297" table:formula="of:=[.E40]/(IF(AND(YEAR([.B40])=YEAR(NOW());MONTH([.B40])=MONTH(NOW()));DAY(NOW());ORG.OPENOFFICE.DAYSINMONTH([.B40])))" office:value-type="currency" office:currency="kWh" office:value="1.06535714285714" calcext:value-type="currency">
            <text:p>1,07 kWh</text:p>
          </table:table-cell>
          <table:table-cell table:style-name="ce303" table:formula="of:=1/([.C40]+[.E40])*[.E40]" office:value-type="percentage" office:value="0.187692694897125" calcext:value-type="percentage">
            <text:p>18,77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5-03-31" calcext:value-type="date">
            <text:p>Mär '25</text:p>
          </table:table-cell>
          <table:table-cell table:style-name="ce149" office:value-type="currency" office:currency="kWh" office:value="89.2" calcext:value-type="currency">
            <text:p>89,2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66.79" calcext:value-type="currency">
            <text:p>66,79 kWh</text:p>
          </table:table-cell>
          <table:table-cell table:style-name="ce364" table:formula="of:=IF([.E41]&gt;[.$N$4];&quot;+&quot;;&quot;-&quot;)" office:value-type="string" office:string-value="+" calcext:value-type="string">
            <text:p>+</text:p>
          </table:table-cell>
          <table:table-cell table:style-name="ce155" table:formula="of:=[.E41]*[.D41]" office:value-type="currency" office:currency="EUR" office:value="23.049229" calcext:value-type="currency">
            <text:p>23,05 €</text:p>
          </table:table-cell>
          <table:table-cell table:style-name="ce155" table:formula="of:=[.H40]+[.G41]" office:value-type="currency" office:currency="EUR" office:value="-178.689782" calcext:value-type="currency">
            <text:p>-178,69 €</text:p>
          </table:table-cell>
          <table:table-cell table:style-name="ce159" table:formula="of:=[.E41]/(IF(AND(YEAR([.B41])=YEAR(NOW());MONTH([.B41])=MONTH(NOW()));DAY(NOW());ORG.OPENOFFICE.DAYSINMONTH([.B41])))" office:value-type="currency" office:currency="kWh" office:value="2.15451612903226" calcext:value-type="currency">
            <text:p>2,15 kWh</text:p>
          </table:table-cell>
          <table:table-cell table:style-name="ce163" table:formula="of:=1/([.C41]+[.E41])*[.E41]" office:value-type="percentage" office:value="0.42816847233797" calcext:value-type="percentage">
            <text:p>42,82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5-04-30" calcext:value-type="date">
            <text:p>Apr '25</text:p>
          </table:table-cell>
          <table:table-cell table:style-name="ce252" office:value-type="currency" office:currency="kWh" office:value="51.1" calcext:value-type="currency">
            <text:p>51,1 kWh</text:p>
          </table:table-cell>
          <table:table-cell table:style-name="ce271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92.78" calcext:value-type="currency">
            <text:p>92,78 kWh</text:p>
          </table:table-cell>
          <table:table-cell table:style-name="ce363" table:formula="of:=IF([.E42]&gt;[.$N$5];&quot;+&quot;;&quot;-&quot;)" office:value-type="string" office:string-value="+" calcext:value-type="string">
            <text:p>+</text:p>
          </table:table-cell>
          <table:table-cell table:style-name="ce290" table:formula="of:=[.E42]*[.D42]" office:value-type="currency" office:currency="EUR" office:value="32.018378" calcext:value-type="currency">
            <text:p>32,02 €</text:p>
          </table:table-cell>
          <table:table-cell table:style-name="ce290" table:formula="of:=[.H41]+[.G42]" office:value-type="currency" office:currency="EUR" office:value="-146.671404" calcext:value-type="currency">
            <text:p>-146,67 €</text:p>
          </table:table-cell>
          <table:table-cell table:style-name="ce297" table:formula="of:=[.E42]/(IF(AND(YEAR([.B42])=YEAR(NOW());MONTH([.B42])=MONTH(NOW()));DAY(NOW());ORG.OPENOFFICE.DAYSINMONTH([.B42])))" office:value-type="currency" office:currency="kWh" office:value="3.09266666666667" calcext:value-type="currency">
            <text:p>3,09 kWh</text:p>
          </table:table-cell>
          <table:table-cell table:style-name="ce303" table:formula="of:=1/([.C42]+[.E42])*[.E42]" office:value-type="percentage" office:value="0.644842924659438" calcext:value-type="percentage">
            <text:p>64,48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5-05-31" calcext:value-type="date">
            <text:p>Mai '25</text:p>
          </table:table-cell>
          <table:table-cell table:style-name="ce149" office:value-type="currency" office:currency="kWh" office:value="45.4" calcext:value-type="currency">
            <text:p>45,4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108.67" calcext:value-type="currency">
            <text:p>108,67 kWh</text:p>
          </table:table-cell>
          <table:table-cell table:style-name="ce364" table:formula="of:=IF([.E43]&gt;[.$N$6];&quot;+&quot;;&quot;-&quot;)" office:value-type="string" office:string-value="+" calcext:value-type="string">
            <text:p>+</text:p>
          </table:table-cell>
          <table:table-cell table:style-name="ce155" table:formula="of:=[.E43]*[.D43]" office:value-type="currency" office:currency="EUR" office:value="37.502017" calcext:value-type="currency">
            <text:p>37,50 €</text:p>
          </table:table-cell>
          <table:table-cell table:style-name="ce155" table:formula="of:=[.H42]+[.G43]" office:value-type="currency" office:currency="EUR" office:value="-109.169387" calcext:value-type="currency">
            <text:p>-109,17 €</text:p>
          </table:table-cell>
          <table:table-cell table:style-name="ce159" table:formula="of:=[.E43]/(IF(AND(YEAR([.B43])=YEAR(NOW());MONTH([.B43])=MONTH(NOW()));DAY(NOW());ORG.OPENOFFICE.DAYSINMONTH([.B43])))" office:value-type="currency" office:currency="kWh" office:value="3.50548387096774" calcext:value-type="currency">
            <text:p>3,51 kWh</text:p>
          </table:table-cell>
          <table:table-cell table:style-name="ce163" table:formula="of:=1/([.C43]+[.E43])*[.E43]" office:value-type="percentage" office:value="0.70532874667359" calcext:value-type="percentage">
            <text:p>70,53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5-06-30" calcext:value-type="date">
            <text:p>Jun '25</text:p>
          </table:table-cell>
          <table:table-cell table:style-name="ce252" office:value-type="currency" office:currency="kWh" office:value="0" calcext:value-type="currency">
            <text:p>0,0 kWh</text:p>
          </table:table-cell>
          <table:table-cell table:style-name="ce271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110.8" calcext:value-type="currency">
            <text:p>110,80 kWh</text:p>
          </table:table-cell>
          <table:table-cell table:style-name="ce363" table:formula="of:=IF([.E44]&gt;[.$N$7];&quot;+&quot;;&quot;-&quot;)" office:value-type="string" office:string-value="+" calcext:value-type="string">
            <text:p>+</text:p>
          </table:table-cell>
          <table:table-cell table:style-name="ce290" table:formula="of:=[.E44]*[.D44]" office:value-type="currency" office:currency="EUR" office:value="38.23708" calcext:value-type="currency">
            <text:p>38,24 €</text:p>
          </table:table-cell>
          <table:table-cell table:style-name="ce290" table:formula="of:=[.H43]+[.G44]" office:value-type="currency" office:currency="EUR" office:value="-70.932307" calcext:value-type="currency">
            <text:p>-70,93 €</text:p>
          </table:table-cell>
          <table:table-cell table:style-name="ce297" table:formula="of:=[.E44]/(IF(AND(YEAR([.B44])=YEAR(NOW());MONTH([.B44])=MONTH(NOW()));DAY(NOW());ORG.OPENOFFICE.DAYSINMONTH([.B44])))" office:value-type="currency" office:currency="kWh" office:value="3.69333333333333" calcext:value-type="currency">
            <text:p>3,69 kWh</text:p>
          </table:table-cell>
          <table:table-cell table:style-name="ce303" table:formula="of:=1/([.C44]+[.E44])*[.E44]" office:value-type="percentage" office:value="1" calcext:value-type="percentage">
            <text:p>100,00 %</text:p>
          </table:table-cell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5-07-31" calcext:value-type="date">
            <text:p>Jul '25</text:p>
          </table:table-cell>
          <table:table-cell table:style-name="ce149" office:value-type="currency" office:currency="kWh" office:value="47.1" calcext:value-type="currency">
            <text:p>47,1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92.2" calcext:value-type="currency">
            <text:p>92,20 kWh</text:p>
          </table:table-cell>
          <table:table-cell table:style-name="ce367" table:formula="of:=IF([.E45]&gt;[.$P$2];&quot;+&quot;;&quot;-&quot;)" office:value-type="string" office:string-value="-" calcext:value-type="string">
            <text:p>-</text:p>
          </table:table-cell>
          <table:table-cell table:style-name="ce155" table:formula="of:=[.E45]*[.D45]" office:value-type="currency" office:currency="EUR" office:value="31.81822" calcext:value-type="currency">
            <text:p>31,82 €</text:p>
          </table:table-cell>
          <table:table-cell table:style-name="ce155" table:formula="of:=[.H44]+[.G45]" office:value-type="currency" office:currency="EUR" office:value="-39.114087" calcext:value-type="currency">
            <text:p>-39,11 €</text:p>
          </table:table-cell>
          <table:table-cell table:style-name="ce159" table:formula="of:=[.E45]/(IF(AND(YEAR([.B45])=YEAR(NOW());MONTH([.B45])=MONTH(NOW()));DAY(NOW());ORG.OPENOFFICE.DAYSINMONTH([.B45])))" office:value-type="currency" office:currency="kWh" office:value="2.9741935483871" calcext:value-type="currency">
            <text:p>2,97 kWh</text:p>
          </table:table-cell>
          <table:table-cell table:style-name="ce163" table:formula="of:=1/([.C45]+[.E45])*[.E45]" office:value-type="percentage" office:value="0.661880832735104" calcext:value-type="percentage">
            <text:p>66,19 %</text:p>
          </table:table-cell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5-08-31" calcext:value-type="date">
            <text:p>Aug '25</text:p>
          </table:table-cell>
          <table:table-cell table:style-name="ce252" office:value-type="currency" office:currency="kWh" office:value="59.8" calcext:value-type="currency">
            <text:p>59,8 kWh</text:p>
          </table:table-cell>
          <table:table-cell table:style-name="ce271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81.1" calcext:value-type="currency">
            <text:p>81,10 kWh</text:p>
          </table:table-cell>
          <table:table-cell table:style-name="ce363" table:formula="of:=IF([.E46]&gt;[.$P$3];&quot;+&quot;;&quot;-&quot;)" office:value-type="string" office:string-value="-" calcext:value-type="string">
            <text:p>-</text:p>
          </table:table-cell>
          <table:table-cell table:style-name="ce290" table:formula="of:=[.E46]*[.D46]" office:value-type="currency" office:currency="EUR" office:value="27.98761" calcext:value-type="currency">
            <text:p>27,99 €</text:p>
          </table:table-cell>
          <table:table-cell table:style-name="ce290" table:formula="of:=[.H45]+[.G46]" office:value-type="currency" office:currency="EUR" office:value="-11.1264769999999" calcext:value-type="currency">
            <text:p>-11,13 €</text:p>
          </table:table-cell>
          <table:table-cell table:style-name="ce297" table:formula="of:=[.E46]/(IF(AND(YEAR([.B46])=YEAR(NOW());MONTH([.B46])=MONTH(NOW()));DAY(NOW());ORG.OPENOFFICE.DAYSINMONTH([.B46])))" office:value-type="currency" office:currency="kWh" office:value="2.61612903225806" calcext:value-type="currency">
            <text:p>2,62 kWh</text:p>
          </table:table-cell>
          <table:table-cell table:style-name="ce303" table:formula="of:=1/([.C46]+[.E46])*[.E46]" office:value-type="percentage" office:value="0.575585521646558" calcext:value-type="percentage">
            <text:p>57,56 %</text:p>
          </table:table-cell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5-09-30" calcext:value-type="date">
            <text:p>Sep '25</text:p>
          </table:table-cell>
          <table:table-cell table:style-name="ce149" office:value-type="currency" office:currency="kWh" office:value="91.5" calcext:value-type="currency">
            <text:p>91,5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55.3" calcext:value-type="currency">
            <text:p>55,30 kWh</text:p>
          </table:table-cell>
          <table:table-cell table:style-name="ce364" table:formula="of:=IF([.E47]&gt;[.$P$4];&quot;+&quot;;&quot;-&quot;)" office:value-type="string" office:string-value="-" calcext:value-type="string">
            <text:p>-</text:p>
          </table:table-cell>
          <table:table-cell table:style-name="ce155" table:formula="of:=[.E47]*[.D47]" office:value-type="currency" office:currency="EUR" office:value="19.08403" calcext:value-type="currency">
            <text:p>19,08 €</text:p>
          </table:table-cell>
          <table:table-cell table:style-name="ce155" table:formula="of:=[.H46]+[.G47]" office:value-type="currency" office:currency="EUR" office:value="7.95755300000005" calcext:value-type="currency">
            <text:p>7,96 €</text:p>
          </table:table-cell>
          <table:table-cell table:style-name="ce159" table:formula="of:=[.E47]/(IF(AND(YEAR([.B47])=YEAR(NOW());MONTH([.B47])=MONTH(NOW()));DAY(NOW());ORG.OPENOFFICE.DAYSINMONTH([.B47])))" office:value-type="currency" office:currency="kWh" office:value="1.84333333333333" calcext:value-type="currency">
            <text:p>1,84 kWh</text:p>
          </table:table-cell>
          <table:table-cell table:style-name="ce163" table:formula="of:=1/([.C47]+[.E47])*[.E47]" office:value-type="percentage" office:value="0.376702997275204" calcext:value-type="percentage">
            <text:p>37,67 %</text:p>
          </table:table-cell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5-10-31" calcext:value-type="date">
            <text:p>Okt '25</text:p>
          </table:table-cell>
          <table:table-cell table:style-name="ce252" office:value-type="currency" office:currency="kWh" office:value="127" calcext:value-type="currency">
            <text:p>127,0 kWh</text:p>
          </table:table-cell>
          <table:table-cell table:style-name="ce271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22.2" calcext:value-type="currency">
            <text:p>22,20 kWh</text:p>
          </table:table-cell>
          <table:table-cell table:style-name="ce363" table:formula="of:=IF([.E48]&gt;[.$P$5];&quot;+&quot;;&quot;-&quot;)" office:value-type="string" office:string-value="-" calcext:value-type="string">
            <text:p>-</text:p>
          </table:table-cell>
          <table:table-cell table:style-name="ce290" table:formula="of:=[.E48]*[.D48]" office:value-type="currency" office:currency="EUR" office:value="7.66122" calcext:value-type="currency">
            <text:p>7,66 €</text:p>
          </table:table-cell>
          <table:table-cell table:style-name="ce290" table:formula="of:=[.H47]+[.G48]" office:value-type="currency" office:currency="EUR" office:value="15.6187730000001" calcext:value-type="currency">
            <text:p>15,62 €</text:p>
          </table:table-cell>
          <table:table-cell table:style-name="ce297" table:formula="of:=[.E48]/(IF(AND(YEAR([.B48])=YEAR(NOW());MONTH([.B48])=MONTH(NOW()));DAY(NOW());ORG.OPENOFFICE.DAYSINMONTH([.B48])))" office:value-type="currency" office:currency="kWh" office:value="0.716129032258065" calcext:value-type="currency">
            <text:p>0,72 kWh</text:p>
          </table:table-cell>
          <table:table-cell table:style-name="ce303" table:formula="of:=1/([.C48]+[.E48])*[.E48]" office:value-type="percentage" office:value="0.148793565683646" calcext:value-type="percentage">
            <text:p>14,88 %</text:p>
          </table:table-cell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5-11-30" calcext:value-type="date">
            <text:p>Nov '25</text:p>
          </table:table-cell>
          <table:table-cell table:style-name="ce149" office:value-type="currency" office:currency="kWh" office:value="151.3" calcext:value-type="currency">
            <text:p>151,3 kWh</text:p>
          </table:table-cell>
          <table:table-cell table:style-name="ce1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17.6" calcext:value-type="currency">
            <text:p>17,60 kWh</text:p>
          </table:table-cell>
          <table:table-cell table:style-name="ce364" table:formula="of:=IF([.E49]&gt;[.$P$6];&quot;+&quot;;&quot;-&quot;)" office:value-type="string" office:string-value="+" calcext:value-type="string">
            <text:p>+</text:p>
          </table:table-cell>
          <table:table-cell table:style-name="ce155" table:formula="of:=[.E49]*[.D49]" office:value-type="currency" office:currency="EUR" office:value="6.07376" calcext:value-type="currency">
            <text:p>6,07 €</text:p>
          </table:table-cell>
          <table:table-cell table:style-name="ce155" table:formula="of:=[.H48]+[.G49]" office:value-type="currency" office:currency="EUR" office:value="21.6925330000001" calcext:value-type="currency">
            <text:p>21,69 €</text:p>
          </table:table-cell>
          <table:table-cell table:style-name="ce159" table:formula="of:=[.E49]/(IF(AND(YEAR([.B49])=YEAR(NOW());MONTH([.B49])=MONTH(NOW()));DAY(NOW());ORG.OPENOFFICE.DAYSINMONTH([.B49])))" office:value-type="currency" office:currency="kWh" office:value="0.586666666666667" calcext:value-type="currency">
            <text:p>0,59 kWh</text:p>
          </table:table-cell>
          <table:table-cell table:style-name="ce163" table:formula="of:=1/([.C49]+[.E49])*[.E49]" office:value-type="percentage" office:value="0.104203670811131" calcext:value-type="percentage">
            <text:p>10,42 %</text:p>
          </table:table-cell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238" office:value-type="date" office:date-value="2025-12-31" calcext:value-type="date">
            <text:p>Dez '25</text:p>
          </table:table-cell>
          <table:table-cell table:style-name="ce254" office:value-type="currency" office:currency="kWh" office:value="170.8" calcext:value-type="currency">
            <text:p>170,8 kWh</text:p>
          </table:table-cell>
          <table:table-cell table:style-name="ce267" office:value-type="currency" office:currency="EUR" office:value="0.3451" calcext:value-type="currency">
            <text:p>0,35 €</text:p>
          </table:table-cell>
          <table:table-cell table:style-name="ce277" office:value-type="currency" office:currency="kWh" office:value="13.5" calcext:value-type="currency">
            <text:p>13,50 kWh</text:p>
          </table:table-cell>
          <table:table-cell table:style-name="ce366" table:formula="of:=IF([.E50]&gt;[.$P$7];&quot;+&quot;;&quot;-&quot;)" office:value-type="string" office:string-value="+" calcext:value-type="string">
            <text:p>+</text:p>
          </table:table-cell>
          <table:table-cell table:style-name="ce267" table:formula="of:=[.E50]*[.D50]" office:value-type="currency" office:currency="EUR" office:value="4.65885" calcext:value-type="currency">
            <text:p>4,66 €</text:p>
          </table:table-cell>
          <table:table-cell table:style-name="ce267" table:formula="of:=[.H49]+[.G50]" office:value-type="currency" office:currency="EUR" office:value="26.3513830000001" calcext:value-type="currency">
            <text:p>26,35 €</text:p>
          </table:table-cell>
          <table:table-cell table:style-name="ce296" table:formula="of:=[.E50]/(IF(AND(YEAR([.B50])=YEAR(NOW());MONTH([.B50])=MONTH(NOW()));DAY(NOW());ORG.OPENOFFICE.DAYSINMONTH([.B50])))" office:value-type="currency" office:currency="kWh" office:value="0.435483870967742" calcext:value-type="currency">
            <text:p>0,44 kWh</text:p>
          </table:table-cell>
          <table:table-cell table:style-name="ce302" table:formula="of:=1/([.C50]+[.E50])*[.E50]" office:value-type="percentage" office:value="0.0732501356483993" calcext:value-type="percentage">
            <text:p>7,33 %</text:p>
          </table:table-cell>
          <table:table-cell/>
          <table:table-cell table:style-name="ce168" office:value-type="float" office:value="2025" calcext:value-type="float">
            <text:p>2025</text:p>
          </table:table-cell>
          <table:table-cell table:style-name="ce249" table:formula="of:=SUM([.C39:.C50])" office:value-type="currency" office:currency="kWh" office:value="1112.2" calcext:value-type="currency">
            <text:p>1.112,2 kWh</text:p>
          </table:table-cell>
          <table:table-cell table:style-name="ce170" table:formula="of:=SUM([.E39:.E50])" office:value-type="currency" office:currency="kWh" office:value="703.76" calcext:value-type="currency">
            <text:p>703,76 kWh</text:p>
          </table:table-cell>
          <table:table-cell table:style-name="ce172" table:formula="of:=SUM([.G39:.G50])" office:value-type="currency" office:currency="EUR" office:value="242.867576" calcext:value-type="currency">
            <text:p>242,87 €</text:p>
          </table:table-cell>
          <table:table-cell table:style-name="ce170" table:formula="of:=[.N50]/IF([.L50]=YEAR(NOW());ROUNDUP(NOW()-DATE([.L50];1;1));ORG.OPENOFFICE.DAYSINYEAR(DATE([.L50];1;1)))" office:value-type="currency" office:currency="kWh" office:value="1.9281095890411" calcext:value-type="currency">
            <text:p>1,93 kWh</text:p>
          </table:table-cell>
          <table:table-cell table:style-name="ce173" table:formula="of:=1/([.M50]+[.N50])*[.N50]" office:value-type="percentage" office:value="0.387541575805635" calcext:value-type="percentage">
            <text:p>38,75 %</text:p>
          </table:table-cell>
          <table:table-cell table:number-columns-repeated="4"/>
        </table:table-row>
        <table:table-row table:style-name="ro2">
          <table:table-cell table:style-name="ce208" office:value-type="float" office:value="2026" calcext:value-type="float" table:number-columns-spanned="1" table:number-rows-spanned="12">
            <text:p>2026</text:p>
          </table:table-cell>
          <table:table-cell table:style-name="ce128" office:value-type="date" office:date-value="2026-01-31" calcext:value-type="date">
            <text:p>Jan '26</text:p>
          </table:table-cell>
          <table:table-cell table:style-name="ce148" office:value-type="currency" office:currency="kWh" office:value="148.4" calcext:value-type="currency">
            <text:p>148,4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4" office:value-type="currency" office:currency="kWh" office:value="13.4" calcext:value-type="currency">
            <text:p>13,40 kWh</text:p>
          </table:table-cell>
          <table:table-cell table:style-name="ce362" table:formula="of:=IF([.E51]&gt;[.$N$2];&quot;+&quot;;&quot;-&quot;)" office:value-type="string" office:string-value="+" calcext:value-type="string">
            <text:p>+</text:p>
          </table:table-cell>
          <table:table-cell table:style-name="ce155" table:formula="of:=[.E51]*[.D51]" office:value-type="currency" office:currency="EUR" office:value="4.62434" calcext:value-type="currency">
            <text:p>4,62 €</text:p>
          </table:table-cell>
          <table:table-cell table:style-name="ce155" table:formula="of:=[.H50]+[.G51]" office:value-type="currency" office:currency="EUR" office:value="30.9757230000001" calcext:value-type="currency">
            <text:p>30,98 €</text:p>
          </table:table-cell>
          <table:table-cell table:style-name="ce159" table:formula="of:=[.E51]/(IF(AND(YEAR([.B51])=YEAR(NOW());MONTH([.B51])=MONTH(NOW()));DAY(NOW());ORG.OPENOFFICE.DAYSINMONTH([.B51])))" office:value-type="currency" office:currency="kWh" office:value="0.432258064516129" calcext:value-type="currency">
            <text:p>0,43 kWh</text:p>
          </table:table-cell>
          <table:table-cell table:style-name="ce163" table:formula="of:=1/([.C51]+[.E51])*[.E51]" office:value-type="percentage" office:value="0.0828182941903585" calcext:value-type="percentage">
            <text:p>8,28 %</text:p>
          </table:table-cell>
          <table:table-cell>
            <draw:frame draw:z-index="5" draw:style-name="gr1" draw:text-style-name="P1" svg:width="15.695cm" svg:height="4.901cm" svg:x="1.112cm" svg:y="0.002cm">
              <draw:object draw:notify-on-update-of-ranges="'BKW Amortisation'.B51:'BKW Amortisation'.B62 'BKW Amortisation'.E13:'BKW Amortisation'.E13 'BKW Amortisation'.E51:'BKW Amortisation'.E62 'BKW Amortisation'.C13:'BKW Amortisation'.C13 'BKW Amortisation'.C51:'BKW Amortisation'.C6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6-02-28" calcext:value-type="date">
            <text:p>Feb '26</text:p>
          </table:table-cell>
          <table:table-cell table:style-name="ce252" office:value-type="currency" office:currency="kWh" office:value="124.3" calcext:value-type="currency">
            <text:p>124,3 kWh</text:p>
          </table:table-cell>
          <table:table-cell table:style-name="ce271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25.9" calcext:value-type="currency">
            <text:p>25,90 kWh</text:p>
          </table:table-cell>
          <table:table-cell table:style-name="ce363" table:formula="of:=IF([.E52]&gt;[.$N$3];&quot;+&quot;;&quot;-&quot;)" office:value-type="string" office:string-value="+" calcext:value-type="string">
            <text:p>+</text:p>
          </table:table-cell>
          <table:table-cell table:style-name="ce290" table:formula="of:=[.E52]*[.D52]" office:value-type="currency" office:currency="EUR" office:value="8.93809" calcext:value-type="currency">
            <text:p>8,94 €</text:p>
          </table:table-cell>
          <table:table-cell table:style-name="ce290" table:formula="of:=[.H51]+[.G52]" office:value-type="currency" office:currency="EUR" office:value="39.9138130000001" calcext:value-type="currency">
            <text:p>39,91 €</text:p>
          </table:table-cell>
          <table:table-cell table:style-name="ce297" table:formula="of:=[.E52]/(IF(AND(YEAR([.B52])=YEAR(NOW());MONTH([.B52])=MONTH(NOW()));DAY(NOW());ORG.OPENOFFICE.DAYSINMONTH([.B52])))" office:value-type="currency" office:currency="kWh" office:value="0.925" calcext:value-type="currency">
            <text:p>0,93 kWh</text:p>
          </table:table-cell>
          <table:table-cell table:style-name="ce303" table:formula="of:=1/([.C52]+[.E52])*[.E52]" office:value-type="percentage" office:value="0.172436750998668" calcext:value-type="percentage">
            <text:p>17,24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6-03-31" calcext:value-type="date">
            <text:p>Mär '26</text:p>
          </table:table-cell>
          <table:table-cell table:style-name="ce149" office:value-type="currency" office:currency="kWh" office:value="101.6" calcext:value-type="currency">
            <text:p>101,6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61.5" calcext:value-type="currency">
            <text:p>61,50 kWh</text:p>
          </table:table-cell>
          <table:table-cell table:style-name="ce364" table:formula="of:=IF([.E53]&gt;[.$N$4];&quot;+&quot;;&quot;-&quot;)" office:value-type="string" office:string-value="+" calcext:value-type="string">
            <text:p>+</text:p>
          </table:table-cell>
          <table:table-cell table:style-name="ce155" table:formula="of:=[.E53]*[.D53]" office:value-type="currency" office:currency="EUR" office:value="21.22365" calcext:value-type="currency">
            <text:p>21,22 €</text:p>
          </table:table-cell>
          <table:table-cell table:style-name="ce155" table:formula="of:=[.H52]+[.G53]" office:value-type="currency" office:currency="EUR" office:value="61.1374630000001" calcext:value-type="currency">
            <text:p>61,14 €</text:p>
          </table:table-cell>
          <table:table-cell table:style-name="ce159" table:formula="of:=[.E53]/(IF(AND(YEAR([.B53])=YEAR(NOW());MONTH([.B53])=MONTH(NOW()));DAY(NOW());ORG.OPENOFFICE.DAYSINMONTH([.B53])))" office:value-type="currency" office:currency="kWh" office:value="1.98387096774194" calcext:value-type="currency">
            <text:p>1,98 kWh</text:p>
          </table:table-cell>
          <table:table-cell table:style-name="ce163" table:formula="of:=1/([.C53]+[.E53])*[.E53]" office:value-type="percentage" office:value="0.377069282648682" calcext:value-type="percentage">
            <text:p>37,71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6-04-30" calcext:value-type="date">
            <text:p>Apr '26</text:p>
          </table:table-cell>
          <table:table-cell table:style-name="ce252" office:value-type="currency" office:currency="kWh" office:value="57.7" calcext:value-type="currency">
            <text:p>57,7 kWh</text:p>
          </table:table-cell>
          <table:table-cell table:style-name="ce271" office:value-type="currency" office:currency="EUR" office:value="0.3451" calcext:value-type="currency">
            <text:p>0,35 €</text:p>
          </table:table-cell>
          <table:table-cell table:style-name="ce275" office:value-type="currency" office:currency="kWh" office:value="98.1" calcext:value-type="currency">
            <text:p>98,10 kWh</text:p>
          </table:table-cell>
          <table:table-cell table:style-name="ce363" table:formula="of:=IF([.E54]&gt;[.$N$5];&quot;+&quot;;&quot;-&quot;)" office:value-type="string" office:string-value="+" calcext:value-type="string">
            <text:p>+</text:p>
          </table:table-cell>
          <table:table-cell table:style-name="ce290" table:formula="of:=[.E54]*[.D54]" office:value-type="currency" office:currency="EUR" office:value="33.85431" calcext:value-type="currency">
            <text:p>33,85 €</text:p>
          </table:table-cell>
          <table:table-cell table:style-name="ce290" table:formula="of:=[.H53]+[.G54]" office:value-type="currency" office:currency="EUR" office:value="94.9917730000001" calcext:value-type="currency">
            <text:p>94,99 €</text:p>
          </table:table-cell>
          <table:table-cell table:style-name="ce297" table:formula="of:=[.E54]/(IF(AND(YEAR([.B54])=YEAR(NOW());MONTH([.B54])=MONTH(NOW()));DAY(NOW());ORG.OPENOFFICE.DAYSINMONTH([.B54])))" office:value-type="currency" office:currency="kWh" office:value="3.27" calcext:value-type="currency">
            <text:p>3,27 kWh</text:p>
          </table:table-cell>
          <table:table-cell table:style-name="ce303" table:formula="of:=1/([.C54]+[.E54])*[.E54]" office:value-type="percentage" office:value="0.629653401797176" calcext:value-type="percentage">
            <text:p>62,97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6-05-31" calcext:value-type="date">
            <text:p>Mai '26</text:p>
          </table:table-cell>
          <table:table-cell table:style-name="ce149" office:value-type="currency" office:currency="kWh" office:value="15" calcext:value-type="currency">
            <text:p>15,0 kWh</text:p>
          </table:table-cell>
          <table:table-cell table:style-name="ce255" office:value-type="currency" office:currency="EUR" office:value="0.3451" calcext:value-type="currency">
            <text:p>0,35 €</text:p>
          </table:table-cell>
          <table:table-cell table:style-name="ce276" office:value-type="currency" office:currency="kWh" office:value="13.8" calcext:value-type="currency">
            <text:p>13,80 kWh</text:p>
          </table:table-cell>
          <table:table-cell table:style-name="ce364" table:formula="of:=IF([.E55]&gt;[.$N$6];&quot;+&quot;;&quot;-&quot;)" office:value-type="string" office:string-value="-" calcext:value-type="string">
            <text:p>-</text:p>
          </table:table-cell>
          <table:table-cell table:style-name="ce155" table:formula="of:=[.E55]*[.D55]" office:value-type="currency" office:currency="EUR" office:value="4.76238" calcext:value-type="currency">
            <text:p>4,76 €</text:p>
          </table:table-cell>
          <table:table-cell table:style-name="ce155" table:formula="of:=[.H54]+[.G55]" office:value-type="currency" office:currency="EUR" office:value="99.7541530000001" calcext:value-type="currency">
            <text:p>99,75 €</text:p>
          </table:table-cell>
          <table:table-cell table:style-name="ce159" table:formula="of:=[.E55]/(IF(AND(YEAR([.B55])=YEAR(NOW());MONTH([.B55])=MONTH(NOW()));DAY(NOW());ORG.OPENOFFICE.DAYSINMONTH([.B55])))" office:value-type="currency" office:currency="kWh" office:value="3.45" calcext:value-type="currency">
            <text:p>3,45 kWh</text:p>
          </table:table-cell>
          <table:table-cell table:style-name="ce163" table:formula="of:=1/([.C55]+[.E55])*[.E55]" office:value-type="percentage" office:value="0.479166666666667" calcext:value-type="percentage">
            <text:p>47,92 %</text:p>
          </table:table-cell>
          <table:table-cell/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6-06-30" calcext:value-type="date">
            <text:p>Jun '26</text:p>
          </table:table-cell>
          <table:table-cell table:style-name="ce252"/>
          <table:table-cell table:style-name="ce271"/>
          <table:table-cell table:style-name="ce275"/>
          <table:table-cell table:style-name="ce363"/>
          <table:table-cell table:style-name="ce290" table:number-columns-repeated="2"/>
          <table:table-cell table:style-name="ce297"/>
          <table:table-cell table:style-name="ce303"/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6-07-31" calcext:value-type="date">
            <text:p>Jul '26</text:p>
          </table:table-cell>
          <table:table-cell table:style-name="ce149"/>
          <table:table-cell table:style-name="ce255"/>
          <table:table-cell table:style-name="ce276"/>
          <table:table-cell table:style-name="ce367"/>
          <table:table-cell table:style-name="ce155" table:number-columns-repeated="2"/>
          <table:table-cell table:style-name="ce159"/>
          <table:table-cell table:style-name="ce163"/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6-08-31" calcext:value-type="date">
            <text:p>Aug '26</text:p>
          </table:table-cell>
          <table:table-cell table:style-name="ce252"/>
          <table:table-cell table:style-name="ce271"/>
          <table:table-cell table:style-name="ce275"/>
          <table:table-cell table:style-name="ce363"/>
          <table:table-cell table:style-name="ce290" table:number-columns-repeated="2"/>
          <table:table-cell table:style-name="ce297"/>
          <table:table-cell table:style-name="ce303"/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6-09-30" calcext:value-type="date">
            <text:p>Sep '26</text:p>
          </table:table-cell>
          <table:table-cell table:style-name="ce149"/>
          <table:table-cell table:style-name="ce255"/>
          <table:table-cell table:style-name="ce276"/>
          <table:table-cell table:style-name="ce364"/>
          <table:table-cell table:style-name="ce155" table:number-columns-repeated="2"/>
          <table:table-cell table:style-name="ce159"/>
          <table:table-cell table:style-name="ce163"/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237" office:value-type="date" office:date-value="2026-10-31" calcext:value-type="date">
            <text:p>Okt '26</text:p>
          </table:table-cell>
          <table:table-cell table:style-name="ce252"/>
          <table:table-cell table:style-name="ce271"/>
          <table:table-cell table:style-name="ce275"/>
          <table:table-cell table:style-name="ce363"/>
          <table:table-cell table:style-name="ce290" table:number-columns-repeated="2"/>
          <table:table-cell table:style-name="ce297"/>
          <table:table-cell table:style-name="ce303"/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128" office:value-type="date" office:date-value="2026-11-30" calcext:value-type="date">
            <text:p>Nov '26</text:p>
          </table:table-cell>
          <table:table-cell table:style-name="ce149"/>
          <table:table-cell table:style-name="ce155"/>
          <table:table-cell table:style-name="ce276"/>
          <table:table-cell table:style-name="ce364"/>
          <table:table-cell table:style-name="ce155" table:number-columns-repeated="2"/>
          <table:table-cell table:style-name="ce159"/>
          <table:table-cell table:style-name="ce163"/>
          <table:table-cell/>
          <table:table-cell table:style-name="ce167" table:number-columns-repeated="6"/>
          <table:table-cell table:number-columns-repeated="4"/>
        </table:table-row>
        <table:table-row table:style-name="ro2">
          <table:covered-table-cell table:style-name="ce209"/>
          <table:table-cell table:style-name="ce238" office:value-type="date" office:date-value="2026-12-31" calcext:value-type="date">
            <text:p>Dez '26</text:p>
          </table:table-cell>
          <table:table-cell table:style-name="ce254"/>
          <table:table-cell table:style-name="ce267"/>
          <table:table-cell table:style-name="ce277"/>
          <table:table-cell table:style-name="ce366"/>
          <table:table-cell table:style-name="ce267" table:number-columns-repeated="2"/>
          <table:table-cell table:style-name="ce296"/>
          <table:table-cell table:style-name="ce302"/>
          <table:table-cell/>
          <table:table-cell table:style-name="ce168" office:value-type="float" office:value="2026" calcext:value-type="float">
            <text:p>2026</text:p>
          </table:table-cell>
          <table:table-cell table:style-name="ce249" table:formula="of:=SUM([.C51:.C62])" office:value-type="currency" office:currency="kWh" office:value="447" calcext:value-type="currency">
            <text:p>447,0 kWh</text:p>
          </table:table-cell>
          <table:table-cell table:style-name="ce170" table:formula="of:=SUM([.E51:.E62])" office:value-type="currency" office:currency="kWh" office:value="212.7" calcext:value-type="currency">
            <text:p>212,70 kWh</text:p>
          </table:table-cell>
          <table:table-cell table:style-name="ce172" table:formula="of:=SUM([.G51:.G62])" office:value-type="currency" office:currency="EUR" office:value="73.40277" calcext:value-type="currency">
            <text:p>73,40 €</text:p>
          </table:table-cell>
          <table:table-cell table:style-name="ce170" table:formula="of:=[.N62]/IF([.L62]=YEAR(NOW());ROUNDUP(NOW()-DATE([.L62];1;1));ORG.OPENOFFICE.DAYSINYEAR(DATE([.L62];1;1)))" office:value-type="currency" office:currency="kWh" office:value="1.71532258064516" calcext:value-type="currency">
            <text:p>1,72 kWh</text:p>
          </table:table-cell>
          <table:table-cell table:style-name="ce173" table:formula="of:=1/([.M62]+[.N62])*[.N62]" office:value-type="percentage" office:value="0.322419281491587" calcext:value-type="percentage">
            <text:p>32,24 %</text:p>
          </table:table-cell>
          <table:table-cell table:number-columns-repeated="4"/>
        </table:table-row>
        <table:table-row table:style-name="ro2" table:number-rows-repeated="148">
          <table:table-cell/>
          <table:table-cell table:style-name="ce117"/>
          <table:table-cell/>
          <table:table-cell table:style-name="ce231"/>
          <table:table-cell table:number-columns-repeated="2"/>
          <table:table-cell table:style-name="ce231" table:number-columns-repeated="2"/>
          <table:table-cell table:number-columns-repeated="13"/>
        </table:table-row>
        <table:table-row table:style-name="ro2" table:number-rows-repeated="1048365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'BKW Amortisation'.F2:'BKW Amortisation'.F62">
            <calcext:condition calcext:apply-style-name="Grüner Text" calcext:value="=&quot;+&quot;" calcext:base-cell-address="'BKW Amortisation'.F2"/>
            <calcext:condition calcext:apply-style-name="Warning" calcext:value="=&quot;-&quot;" calcext:base-cell-address="'BKW Amortisation'.F2"/>
          </calcext:conditional-format>
          <calcext:conditional-format calcext:target-range-address="'BKW Amortisation'.F20:'BKW Amortisation'.F20">
            <calcext:condition calcext:apply-style-name="Grüner Text" calcext:value="=&quot;+&quot;" calcext:base-cell-address="'BKW Amortisation'.F20"/>
            <calcext:condition calcext:apply-style-name="Bad" calcext:value="=&quot;-&quot;" calcext:base-cell-address="'BKW Amortisation'.F20"/>
          </calcext:conditional-format>
          <calcext:conditional-format calcext:target-range-address="'BKW Amortisation'.N2:'BKW Amortisation'.N7 'BKW Amortisation'.P2:'BKW Amortisation'.P7">
            <calcext:data-bar calcext:max-length="100" calcext:negative-color="#004586" calcext:positive-color="#ffd320" calcext:axis-color="#000000">
              <calcext:formatting-entry calcext:value="0" calcext:type="number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'BKW Amortisation'.B4:'BKW Amortisation'.D5" table:contains-header="false">
          <table:sort table:bind-styles-to-content="false"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date-style style:name="N116">
      <number:month number:textual="true"/>
      <number:text> </number:text>
      <number:year number:style="long"/>
    </number:date-style>
    <number:currency-style style:name="N117" number:title="Kubikmeter">
      <number:number number:decimal-places="2" number:min-decimal-places="2" number:min-integer-digits="1" number:grouping="true"/>
      <number:text> </number:text>
      <number:currency-symbol>m³</number:currency-symbol>
    </number:currency-style>
    <number:currency-style style:name="N118">
      <number:number number:decimal-places="1" number:min-decimal-places="1" number:min-integer-digits="1" number:grouping="true"/>
      <number:text> </number:text>
      <number:currency-symbol>kWh</number:currency-symbol>
    </number:currency-style>
    <number:currency-style style:name="N119" number:title="Kubikmeter">
      <number:number number:decimal-places="0" number:min-decimal-places="0" number:min-integer-digits="1" number:grouping="true"/>
      <number:text> </number:text>
      <number:currency-symbol>m³</number:currency-symbol>
    </number:currency-style>
    <number:currency-style style:name="N120" number:title="Kubikmeter">
      <number:number number:decimal-places="3" number:min-decimal-places="3" number:min-integer-digits="1" number:grouping="true"/>
      <number:text> </number:text>
      <number:currency-symbol>m³</number:currency-symbol>
    </number:currency-style>
    <number:date-style style:name="N121">
      <number:month number:style="long" number:textual="true"/>
      <number:text> </number:text>
      <number:year number:style="long"/>
    </number:date-style>
    <number:currency-style style:name="N123P0" style:volatile="true">
      <number:number number:decimal-places="2" number:min-decimal-places="2" number:min-integer-digits="1" number:grouping="true"/>
      <number:text> </number:text>
      <number:currency-symbol>kWh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>kWh</number:currency-symbol>
      <style:map style:condition="value()&gt;=0" style:apply-style-name="N123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0000ff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currency-style style:name="N127P0" style:volatile="true">
      <number:number number:decimal-places="1" number:min-decimal-places="1" number:min-integer-digits="1" number:grouping="true"/>
      <number:text> </number:text>
      <number:currency-symbol>kWh</number:currency-symbol>
    </number:currency-style>
    <number:currency-style style:name="N127">
      <number:text>-</number:text>
      <number:number number:decimal-places="1" number:min-decimal-places="1" number:min-integer-digits="1" number:grouping="true"/>
      <number:text> </number:text>
      <number:currency-symbol>kWh</number:currency-symbol>
      <style:map style:condition="value()&gt;=0" style:apply-style-name="N127P0"/>
    </number:currency-style>
    <number:number-style style:name="N129P0" style:volatile="true">
      <style:text-properties fo:color="#ff0000"/>
      <number:text>+</number:text>
      <number:number number:decimal-places="2" number:min-decimal-places="2" number:min-integer-digits="1"/>
    </number:number-style>
    <number:number-style style:name="N129">
      <style:text-properties fo:color="#0000ff"/>
      <number:text>-</number:text>
      <number:number number:decimal-places="2" number:min-decimal-places="2" number:min-integer-digits="1"/>
      <style:map style:condition="value()&gt;=0" style:apply-style-name="N129P0"/>
    </number:number-style>
    <number:currency-style style:name="N131P0" style:volatile="true">
      <style:text-properties fo:color="#ff0000"/>
      <number:text>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0000ff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date-style style:name="N132">
      <number:month number:style="long" number:textual="true"/>
      <number:text> '</number:text>
      <number:year/>
    </number:date-style>
    <number:currency-style style:name="N134P0" style:volatile="true">
      <number:number number:decimal-places="3" number:min-decimal-places="3" number:min-integer-digits="1" number:grouping="true"/>
      <number:text> </number:text>
      <number:currency-symbol>kWh</number:currency-symbol>
    </number:currency-style>
    <number:currency-style style:name="N134">
      <number:text>-</number:text>
      <number:number number:decimal-places="3" number:min-decimal-places="3" number:min-integer-digits="1" number:grouping="true"/>
      <number:text> </number:text>
      <number:currency-symbol>kWh</number:currency-symbol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üner_20_Text" style:display-name="Grüner Text" style:family="table-cell" style:parent-style-name="Default">
      <style:text-properties fo:color="#008000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63cm" fo:margin-bottom="1.6cm" fo:margin-left="1.085cm" fo:margin-right="1.039cm" style:scale-to-X="1" style:table-centering="horizontal" style:writing-mode="lr-tb"/>
      <style:header-style>
        <style:header-footer-properties fo:min-height="2.145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Amortisation Balkonkraftwerk</text:span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11:54:01.474858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2-18T09:26:24.536000000</meta:creation-date>
    <dc:date>2026-05-04T17:00:15.770429600</dc:date>
    <meta:editing-duration>P229DT20H23M46S</meta:editing-duration>
    <meta:editing-cycles>478</meta:editing-cycles>
    <meta:generator>LibreOffice/26.2.0.3$Windows_X86_64 LibreOffice_project/620$Build-3</meta:generator>
    <meta:print-date>2026-03-05T16:30:18.491028500</meta:print-date>
    <dc:creator>Markus Buscher</dc:creator>
    <meta:printed-by>Markus Buscher</meta:printed-by>
    <meta:document-statistic meta:table-count="1" meta:cell-count="453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16">
      <number:month number:textual="true"/>
      <number:text> </number:text>
      <number:year number:style="long"/>
    </number:date-style>
    <number:currency-style style:name="N118">
      <number:number number:decimal-places="1" number:min-decimal-places="1" number:min-integer-digits="1" number:grouping="true"/>
      <number:text> </number:text>
      <number:currency-symbol>kWh</number:currency-symbol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1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4.902cm" xlink:href=".." xlink:type="simple" chart:class="chart:bar" chart:style-name="ch1">
        <chart:legend chart:legend-position="end" svg:x="13.277cm" svg:y="1.506cm" style:legend-expansion="high" chart:style-name="ch2"/>
        <chart:plot-area chart:style-name="ch3" svg:x="0.313cm" svg:y="0.098cm" svg:width="12.651cm" svg:height="4.706cm">
          <chart:coordinate-region svg:x="2.208cm" svg:y="0.297cm" svg:width="10.756cm" svg:height="3.159cm"/>
          <chart:axis chart:dimension="x" chart:name="primary-x" chart:style-name="ch4" chartooo:axis-type="auto">
            <chartooo:date-scale/>
            <chart:categories table:cell-range-address="'BKW Amortisation'.B14:'BKW Amortisation'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KW Amortisation'.E14:'BKW Amortisation'.E26" chart:label-cell-address="'BKW Amortisation'.E13:'BKW Amortisation'.E13" chart:class="chart:bar">
            <chart:data-point chart:repeated="13"/>
          </chart:series>
          <chart:series chart:style-name="ch8" chart:values-cell-range-address="'BKW Amortisation'.C14:'BKW Amortisation'.C26" chart:label-cell-address="'BKW Amortisation'.C13:'BKW Amortisation'.C13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zeugung
PV-Anlage</text:p>
                <draw:g>
                  <svg:desc>'BKW Amortisation'.E13:'BKW Amortisation'.E13</svg:desc>
                </draw:g>
              </table:table-cell>
              <table:table-cell office:value-type="string">
                <text:p>Verbrauch
Netz</text:p>
                <draw:g>
                  <svg:desc>'BKW Amortisation'.C13:'BKW Amortisation'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BKW Amortisation'.B14:'BKW Amortisation'.B26</svg:desc>
                </draw:g>
              </table:table-cell>
              <table:table-cell office:value-type="float" office:value="NaN">
                <text:p>NaN</text:p>
                <draw:g>
                  <svg:desc>'BKW Amortisation'.E14:'BKW Amortisation'.E26</svg:desc>
                </draw:g>
              </table:table-cell>
              <table:table-cell office:value-type="float" office:value="NaN">
                <text:p>NaN</text:p>
                <draw:g>
                  <svg:desc>'BKW Amortisation'.C14:'BKW Amortisation'.C26</svg:desc>
                </draw:g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NaN">
                <text:p>NaN</text:p>
              </table:table-cell>
              <table:table-cell office:value-type="float" office:value="165.900000000009">
                <text:p>165.900000000009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NaN">
                <text:p>NaN</text:p>
              </table:table-cell>
              <table:table-cell office:value-type="float" office:value="143.399999999994">
                <text:p>143.399999999994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NaN">
                <text:p>NaN</text:p>
              </table:table-cell>
              <table:table-cell office:value-type="float" office:value="162.899999999994">
                <text:p>162.899999999994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NaN">
                <text:p>NaN</text:p>
              </table:table-cell>
              <table:table-cell office:value-type="float" office:value="162.400000000009">
                <text:p>162.400000000009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NaN">
                <text:p>NaN</text:p>
              </table:table-cell>
              <table:table-cell office:value-type="float" office:value="149.399999999994">
                <text:p>149.399999999994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70.3">
                <text:p>70.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104.05">
                <text:p>104.05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85.61">
                <text:p>85.61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82.34">
                <text:p>82.3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36.93">
                <text:p>36.93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4.25">
                <text:p>14.25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7.97">
                <text:p>7.97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_20_46" draw:display-name="Hatch 46" draw:style="single" draw:color="#000000" draw:distance="0cm" draw:rotation="0"/>
    <draw:stroke-dash draw:name="_32__20_Dots_20_1_20_Dash_20_1" draw:display-name="2 Dots 1 Dash 1" draw:style="rect" draw:dots1="1" draw:dots1-length="0.02cm" draw:dots2="1" draw:dots2-length="0.02cm" draw:distance="0.02cm"/>
    <draw:stroke-dash draw:name="Excel_20_line_20_dash_20_1" draw:display-name="Excel line dash 1" draw:style="rect" draw:dots1="1" draw:dots1-length="0.105cm" draw:distance="0.105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16">
      <number:month number:textual="true"/>
      <number:text> </number:text>
      <number:year number:style="long"/>
    </number:date-style>
    <number:currency-style style:name="N118">
      <number:number number:decimal-places="1" number:min-decimal-places="1" number:min-integer-digits="1" number:grouping="true"/>
      <number:text> </number:text>
      <number:currency-symbol>kWh</number:currency-symbol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4.902cm" xlink:href=".." xlink:type="simple" chart:class="chart:bar" chart:style-name="ch1">
        <chart:legend chart:legend-position="end" svg:x="13.277cm" svg:y="1.506cm" style:legend-expansion="high" chart:style-name="ch2"/>
        <chart:plot-area chart:style-name="ch3" svg:x="0.313cm" svg:y="0.098cm" svg:width="12.651cm" svg:height="4.706cm">
          <chart:coordinate-region svg:x="2.208cm" svg:y="0.297cm" svg:width="10.756cm" svg:height="3.159cm"/>
          <chart:axis chart:dimension="x" chart:name="primary-x" chart:style-name="ch4" chartooo:axis-type="auto">
            <chartooo:date-scale/>
            <chart:categories table:cell-range-address="'BKW Amortisation'.B27:'BKW Amortisation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KW Amortisation'.E27:'BKW Amortisation'.E38" chart:label-cell-address="'BKW Amortisation'.E13:'BKW Amortisation'.E13" chart:class="chart:bar">
            <chart:data-point chart:repeated="12"/>
          </chart:series>
          <chart:series chart:style-name="ch8" chart:values-cell-range-address="'BKW Amortisation'.C27:'BKW Amortisation'.C38" chart:label-cell-address="'BKW Amortisation'.C13:'BKW Amortisation'.C1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zeugung
PV-Anlage</text:p>
                <draw:g>
                  <svg:desc>'BKW Amortisation'.E13:'BKW Amortisation'.E13</svg:desc>
                </draw:g>
              </table:table-cell>
              <table:table-cell office:value-type="string">
                <text:p>Verbrauch
Netz</text:p>
                <draw:g>
                  <svg:desc>'BKW Amortisation'.C13:'BKW Amortisation'.C13</svg:desc>
                </draw:g>
              </table:table-cell>
            </table:table-row>
          </table:table-header-rows>
          <table:table-rows>
            <table:table-row>
              <table:table-cell office:value-type="float" office:value="45322">
                <text:p>45322</text:p>
                <draw:g>
                  <svg:desc>'BKW Amortisation'.B27:'BKW Amortisation'.B38</svg:desc>
                </draw:g>
              </table:table-cell>
              <table:table-cell office:value-type="float" office:value="12.94">
                <text:p>12.94</text:p>
                <draw:g>
                  <svg:desc>'BKW Amortisation'.E27:'BKW Amortisation'.E38</svg:desc>
                </draw:g>
              </table:table-cell>
              <table:table-cell office:value-type="float" office:value="142.5">
                <text:p>142.5</text:p>
                <draw:g>
                  <svg:desc>'BKW Amortisation'.C27:'BKW Amortisation'.C38</svg:desc>
                </draw:g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21.87">
                <text:p>21.87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6.66">
                <text:p>46.66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65.87">
                <text:p>65.8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94.25">
                <text:p>94.25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96.79">
                <text:p>96.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01.63">
                <text:p>101.63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00.6">
                <text:p>100.6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58.09">
                <text:p>58.09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33.05">
                <text:p>33.05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5.97">
                <text:p>15.97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0.05">
                <text:p>10.05</text:p>
              </table:table-cell>
              <table:table-cell office:value-type="float" office:value="177.1">
                <text:p>17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_20_46" draw:display-name="Hatch 46" draw:style="single" draw:color="#000000" draw:distance="0cm" draw:rotation="0"/>
    <draw:stroke-dash draw:name="_32__20_Dots_20_1_20_Dash_20_1" draw:display-name="2 Dots 1 Dash 1" draw:style="rect" draw:dots1="1" draw:dots1-length="0.02cm" draw:dots2="1" draw:dots2-length="0.02cm" draw:distance="0.02cm"/>
    <draw:stroke-dash draw:name="Excel_20_line_20_dash_20_1" draw:display-name="Excel line dash 1" draw:style="rect" draw:dots1="1" draw:dots1-length="0.105cm" draw:distance="0.105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16">
      <number:month number:textual="true"/>
      <number:text> </number:text>
      <number:year number:style="long"/>
    </number:date-style>
    <number:currency-style style:name="N118">
      <number:number number:decimal-places="1" number:min-decimal-places="1" number:min-integer-digits="1" number:grouping="true"/>
      <number:text> </number:text>
      <number:currency-symbol>kWh</number:currency-symbol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4.902cm" xlink:href=".." xlink:type="simple" chart:class="chart:bar" chart:style-name="ch1">
        <chart:legend chart:legend-position="end" svg:x="13.277cm" svg:y="1.506cm" style:legend-expansion="high" chart:style-name="ch2"/>
        <chart:plot-area chart:style-name="ch3" svg:x="0.313cm" svg:y="0.098cm" svg:width="12.651cm" svg:height="4.706cm">
          <chart:coordinate-region svg:x="2.208cm" svg:y="0.297cm" svg:width="10.756cm" svg:height="3.159cm"/>
          <chart:axis chart:dimension="x" chart:name="primary-x" chart:style-name="ch4" chartooo:axis-type="auto">
            <chartooo:date-scale/>
            <chart:categories table:cell-range-address="'BKW Amortisation'.B39:'BKW Amortisation'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KW Amortisation'.E39:'BKW Amortisation'.E50" chart:label-cell-address="'BKW Amortisation'.E13:'BKW Amortisation'.E13" chart:class="chart:bar">
            <chart:data-point chart:repeated="12"/>
          </chart:series>
          <chart:series chart:style-name="ch8" chart:values-cell-range-address="'BKW Amortisation'.C39:'BKW Amortisation'.C50" chart:label-cell-address="'BKW Amortisation'.C13:'BKW Amortisation'.C1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zeugung
PV-Anlage</text:p>
                <draw:g>
                  <svg:desc>'BKW Amortisation'.E13:'BKW Amortisation'.E13</svg:desc>
                </draw:g>
              </table:table-cell>
              <table:table-cell office:value-type="string">
                <text:p>Verbrauch
Netz</text:p>
                <draw:g>
                  <svg:desc>'BKW Amortisation'.C13:'BKW Amortisation'.C13</svg:desc>
                </draw:g>
              </table:table-cell>
            </table:table-row>
          </table:table-header-rows>
          <table:table-rows>
            <table:table-row>
              <table:table-cell office:value-type="float" office:value="45688">
                <text:p>45688</text:p>
                <draw:g>
                  <svg:desc>'BKW Amortisation'.B39:'BKW Amortisation'.B50</svg:desc>
                </draw:g>
              </table:table-cell>
              <table:table-cell office:value-type="float" office:value="12.99">
                <text:p>12.99</text:p>
                <draw:g>
                  <svg:desc>'BKW Amortisation'.E39:'BKW Amortisation'.E50</svg:desc>
                </draw:g>
              </table:table-cell>
              <table:table-cell office:value-type="float" office:value="149.9">
                <text:p>149.9</text:p>
                <draw:g>
                  <svg:desc>'BKW Amortisation'.C39:'BKW Amortisation'.C50</svg:desc>
                </draw:g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29.83">
                <text:p>29.83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66.79">
                <text:p>66.7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92.78">
                <text:p>92.78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108.67">
                <text:p>108.6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10.8">
                <text:p>1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92.2">
                <text:p>92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81.1">
                <text:p>81.1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55.3">
                <text:p>55.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22.2">
                <text:p>22.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17.6">
                <text:p>17.6</text:p>
              </table:table-cell>
              <table:table-cell office:value-type="float" office:value="151.3">
                <text:p>151.3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3.5">
                <text:p>13.5</text:p>
              </table:table-cell>
              <table:table-cell office:value-type="float" office:value="170.8">
                <text:p>17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_20_46" draw:display-name="Hatch 46" draw:style="single" draw:color="#000000" draw:distance="0cm" draw:rotation="0"/>
    <draw:stroke-dash draw:name="_32__20_Dots_20_1_20_Dash_20_1" draw:display-name="2 Dots 1 Dash 1" draw:style="rect" draw:dots1="1" draw:dots1-length="0.02cm" draw:dots2="1" draw:dots2-length="0.02cm" draw:distance="0.02cm"/>
    <draw:stroke-dash draw:name="Excel_20_line_20_dash_20_1" draw:display-name="Excel line dash 1" draw:style="rect" draw:dots1="1" draw:dots1-length="0.105cm" draw:distance="0.105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16">
      <number:month number:textual="true"/>
      <number:text> </number:text>
      <number:year number:style="long"/>
    </number:date-style>
    <number:currency-style style:name="N118">
      <number:number number:decimal-places="1" number:min-decimal-places="1" number:min-integer-digits="1" number:grouping="true"/>
      <number:text> </number:text>
      <number:currency-symbol>kWh</number:currency-symbol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4.902cm" xlink:href=".." xlink:type="simple" chart:class="chart:bar" chart:style-name="ch1">
        <chart:legend chart:legend-position="end" svg:x="13.277cm" svg:y="1.506cm" style:legend-expansion="high" chart:style-name="ch2"/>
        <chart:plot-area chart:style-name="ch3" svg:x="0.313cm" svg:y="0.098cm" svg:width="12.651cm" svg:height="4.706cm">
          <chart:coordinate-region svg:x="2.208cm" svg:y="0.098cm" svg:width="10.756cm" svg:height="3.358cm"/>
          <chart:axis chart:dimension="x" chart:name="primary-x" chart:style-name="ch4" chartooo:axis-type="auto">
            <chartooo:date-scale/>
            <chart:categories table:cell-range-address="'BKW Amortisation'.B51:'BKW Amortisation'.B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KW Amortisation'.E51:'BKW Amortisation'.E62" chart:label-cell-address="'BKW Amortisation'.E13:'BKW Amortisation'.E13" chart:class="chart:bar">
            <chart:data-point chart:repeated="12"/>
          </chart:series>
          <chart:series chart:style-name="ch8" chart:values-cell-range-address="'BKW Amortisation'.C51:'BKW Amortisation'.C62" chart:label-cell-address="'BKW Amortisation'.C13:'BKW Amortisation'.C1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zeugung
PV-Anlage</text:p>
                <draw:g>
                  <svg:desc>'BKW Amortisation'.E13:'BKW Amortisation'.E13</svg:desc>
                </draw:g>
              </table:table-cell>
              <table:table-cell office:value-type="string">
                <text:p>Verbrauch
Netz</text:p>
                <draw:g>
                  <svg:desc>'BKW Amortisation'.C13:'BKW Amortisation'.C13</svg:desc>
                </draw:g>
              </table:table-cell>
            </table:table-row>
          </table:table-header-rows>
          <table:table-rows>
            <table:table-row>
              <table:table-cell office:value-type="float" office:value="46053">
                <text:p>46053</text:p>
                <draw:g>
                  <svg:desc>'BKW Amortisation'.B51:'BKW Amortisation'.B62</svg:desc>
                </draw:g>
              </table:table-cell>
              <table:table-cell office:value-type="float" office:value="13.4">
                <text:p>13.4</text:p>
                <draw:g>
                  <svg:desc>'BKW Amortisation'.E51:'BKW Amortisation'.E62</svg:desc>
                </draw:g>
              </table:table-cell>
              <table:table-cell office:value-type="float" office:value="148.4">
                <text:p>148.4</text:p>
                <draw:g>
                  <svg:desc>'BKW Amortisation'.C51:'BKW Amortisation'.C62</svg:desc>
                </draw:g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25.9">
                <text:p>25.9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61.5">
                <text:p>61.5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98.1">
                <text:p>98.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13.8">
                <text:p>13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34">
                <text:p>4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65">
                <text:p>4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95">
                <text:p>4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26">
                <text:p>4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56">
                <text:p>4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87">
                <text:p>4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_20_46" draw:display-name="Hatch 46" draw:style="single" draw:color="#000000" draw:distance="0cm" draw:rotation="0"/>
    <draw:stroke-dash draw:name="_32__20_Dots_20_1_20_Dash_20_1" draw:display-name="2 Dots 1 Dash 1" draw:style="rect" draw:dots1="1" draw:dots1-length="0.02cm" draw:dots2="1" draw:dots2-length="0.02cm" draw:distance="0.02cm"/>
    <draw:stroke-dash draw:name="Excel_20_line_20_dash_20_1" draw:display-name="Excel line dash 1" draw:style="rect" draw:dots1="1" draw:dots1-length="0.105cm" draw:distance="0.105cm"/>
  </office:styles>
</office:document-styles>
</file>